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76a30" officeooo:paragraph-rsid="001ad2aa"/>
    </style:style>
    <style:style style:name="P2" style:family="paragraph" style:parent-style-name="Text_20_body">
      <style:text-properties officeooo:rsid="001ad2aa" officeooo:paragraph-rsid="001ad2aa"/>
    </style:style>
    <style:style style:name="P3" style:family="paragraph" style:parent-style-name="Text_20_body">
      <style:text-properties officeooo:rsid="00176a30" officeooo:paragraph-rsid="00176a30"/>
    </style:style>
    <style:style style:name="P4" style:family="paragraph" style:parent-style-name="Text_20_body">
      <style:text-properties fo:font-style="italic" style:font-style-asian="italic" style:font-style-complex="italic"/>
    </style:style>
    <style:style style:name="T1" style:family="text">
      <style:text-properties officeooo:rsid="001a12a4"/>
    </style:style>
    <style:style style:name="T2" style:family="text">
      <style:text-properties officeooo:rsid="00179128"/>
    </style:style>
    <style:style style:name="T3" style:family="text">
      <style:text-properties officeooo:rsid="001ad2aa"/>
    </style:style>
    <style:style style:name="T4" style:family="text">
      <style:text-properties officeooo:rsid="001923c5"/>
    </style:style>
    <style:style style:name="T5" style:family="text">
      <style:text-properties officeooo:rsid="001cc7c3"/>
    </style:style>
    <style:style style:name="T6" style:family="text">
      <style:text-properties officeooo:rsid="001ff664"/>
    </style:style>
    <style:style style:name="T7" style:family="text">
      <style:text-properties officeooo:rsid="001e0b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přístupnění morfosyntakticky anotovaného vzorku staro- a středněčeských textů v korpusové kolekci Universal Dependencies (UD) <text:span text:style-name="T1">by mělo dle mého názoru výhody pro různé cílové skupiny, včetně ÚJČ. UD využívají různé druhy uživatelů, které lze velmi hrubě rozdělit na lingvisty a informatiky. Z lingvistického hlediska je UD zajímavé hlavně pro srovnávání a typologii, protože nabízí data pro téměř 200 jazyků různých rodin, v různých žánrech a dialektech, to vše s jednotnou morfologickou a syntaktickou anotací. Postupně přibývají i</text:span><text:span text:style-name="T2"> diachronní korpusy, někdy i dost rozsáhlé (např. stará a střední francouzština, italština, irština, švédština…). </text:span><text:span text:style-name="T3">Je to ukázka</text:span><text:span text:style-name="T2">, jak lze pomocí jednotných anotačních pravidel označkovat texty nejen pro různé jazyky, ale také pro různé vývojové fáze jednoho jazyka, </text:span><text:span text:style-name="T4">včetně gramatických jevů, které postupně vymizely.</text:span><text:span text:style-name="T2"> </text:span><text:span text:style-name="T1">B</text:span><text:span text:style-name="T2">ohužel pro češtinu taková data </text:span><text:span text:style-name="T1">v UD</text:span><text:span text:style-name="T2"> zatím zcela chybí, pře</text:span><text:span text:style-name="T3">s</text:span><text:span text:style-name="T2">tože </text:span><text:span text:style-name="T4">jinak čeština velikostí dat předčí i velké světové jazyky; jsou to však pouze data z 20. a 21. století.</text:span></text:p>
      <text:p text:style-name="P2">Z perspektivy počítačového zpracování jazyka je UD zajímavé pro výzkumníky vyvíjející nástroje pro automatickou analýzu jazyka (parsery, taggery), popř. různé výukové aplikace. Mohli by si např. otestovat,<text:span text:style-name="T2"> do jaké míry si jejich analyzátor poradí se starou češtinou, resp. jaké chyby dělá. </text:span>K tomu ale potřebují přístup přímo k souborům s korpusem, nikoli pouze ke korpusovému vyhledávači na webu.</text:p>
      <text:p text:style-name="P2">Lingvisté mohou <text:span text:style-name="T5">UD prohledávat pomocí</text:span> specializovan<text:span text:style-name="T5">ých</text:span> vyhledávací<text:span text:style-name="T5">ch</text:span> nástroj<text:span text:style-name="T5">ů</text:span> (<text:span text:style-name="T5">dotazy nejen na kolokace a morfologii, ale i na syntaktické vztahy). V případě starších českých dat se bavíme pouze o malém vzorku </text:span><text:span text:style-name="T6">neúplných textů</text:span><text:span text:style-name="T5">, který může demonstrovat některé jevy typické pro určitá období, seriózním zájemcům zaměřeným na starou češtinu ale pochopitelně stačit nebude – ti budou spíše stát o plné texty ze Staročeské banky, oanotované pomocí modelů z projektu HiČKoK. </text:span><text:span text:style-name="T7">Zde ale může UD poskytnout zviditelnění a určitou reklamu na data, kterými disponuje ÚJČ. V počítačové lingvistice je bezplatné sdílení mnohojazyčných dat v posledních 20 letech trend, k datům se pak dostanou i uživatelé, kteří původně nehledali konkrétně starou češtinu, ale chtěli jen něco otestovat a porovnat na mnoha různých jazycích. Každý korpus v UD má dokumentaci, kde je přiznán kredit poskytovatelům/tvůrcům dat, zde by tato dokumentace mohla být současně pozvánkou třeba na stránky ÚJČ, Vokabulář webový apod.</text:span></text:p>
      <text:p text:style-name="P3">Licence: V UD se standardně používá CreativeCommons, případně lze omezit na nekomerční využití, i když v tomto případě to asi nemá valné opodstatnění (je těžké si představit, že by nějaká firma vydělala velké peníze na tom, že do svých modelů přidá stovky let staré české texty, navíc v tak nepatrném rozsahu).</text:p>
      <text:p text:style-name="Text_20_body"/>
      <text:p text:style-name="P4">Taky jsem se ptal u staročechů, jestli bude možné syntaktické etalony volně distribuovat. Odpověď jsem dostal podle očekávání vyhýbavou s tím, že to bude nutné probrat s panem řiditelem ústavu, neb to může být teoreticky ústavní zájem (že bych použil texty, které jsem transkriboval, moc relevantní argument pro ně není). Nicméně vedoucí staročechů je moje spolužačka a snad i dobrá známá, tak navrhuje, abys ji (mně) napsal pár slov, oč vlastně jde, aby se dalo nějak argumentovat před řiditelem. Můj názor je, že to půjde, zvlášť když budem pořád zdůrazňovat, že nepůjde o celé texty, ale jen o pár vět z několik textů.</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6-06-06T19:46:06.147306200</meta:creation-date>
    <dc:date>2026-06-06T21:15:39.817893700</dc:date>
    <dc:creator>Daniel Zeman</dc:creator>
    <meta:editing-duration>PT9M3S</meta:editing-duration>
    <meta:editing-cycles>2</meta:editing-cycles>
    <meta:generator>LibreOffice/25.2.7.2$Windows_X86_64 LibreOffice_project/5cbfd1ab6520636bb5f7b99185aa69bd7456825d</meta:generator>
    <meta:document-statistic meta:table-count="0" meta:image-count="0" meta:object-count="0" meta:page-count="1" meta:paragraph-count="5" meta:word-count="506" meta:character-count="3332" meta:non-whitespace-character-count="2830"/>
  </office:meta>
</office:document-meta>
</file>