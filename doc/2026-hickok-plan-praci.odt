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110299" officeooo:paragraph-rsid="00110299"/>
    </style:style>
    <style:style style:name="P2" style:family="paragraph" style:parent-style-name="Text_20_body" style:list-style-name="L1">
      <style:text-properties officeooo:rsid="00110299" officeooo:paragraph-rsid="00110299" fo:background-color="#f6f9d4"/>
    </style:style>
    <style:style style:name="P3" style:family="paragraph" style:parent-style-name="Text_20_body" style:list-style-name="L1">
      <style:text-properties officeooo:rsid="00110299" officeooo:paragraph-rsid="00110299"/>
    </style:style>
    <style:style style:name="P4" style:family="paragraph" style:parent-style-name="Text_20_body" style:list-style-name="L1">
      <style:text-properties officeooo:rsid="00116150" officeooo:paragraph-rsid="00116150"/>
    </style:style>
    <style:style style:name="P5" style:family="paragraph" style:parent-style-name="Text_20_body" style:list-style-name="L1">
      <style:text-properties officeooo:rsid="0011d30d" officeooo:paragraph-rsid="0011d30d"/>
    </style:style>
    <style:style style:name="P6" style:family="paragraph" style:parent-style-name="Text_20_body" style:list-style-name="L1">
      <style:text-properties officeooo:rsid="001188d1" officeooo:paragraph-rsid="001188d1"/>
    </style:style>
    <style:style style:name="P7" style:family="paragraph" style:parent-style-name="Heading_20_1">
      <style:text-properties officeooo:rsid="00147183" officeooo:paragraph-rsid="00147183"/>
    </style:style>
    <style:style style:name="P8" style:family="paragraph" style:parent-style-name="Heading_20_2">
      <style:text-properties officeooo:rsid="00147183" officeooo:paragraph-rsid="00147183"/>
    </style:style>
    <style:style style:name="P9" style:family="paragraph" style:parent-style-name="Text_20_body">
      <style:text-properties officeooo:rsid="00147183" officeooo:paragraph-rsid="00147183"/>
    </style:style>
    <style:style style:name="P10" style:family="paragraph" style:parent-style-name="Text_20_body">
      <style:text-properties officeooo:rsid="001538a3" officeooo:paragraph-rsid="001538a3"/>
    </style:style>
    <style:style style:name="P11" style:family="paragraph" style:parent-style-name="Heading_20_3">
      <style:text-properties officeooo:rsid="00147183" officeooo:paragraph-rsid="00147183"/>
    </style:style>
    <style:style style:name="P12" style:family="paragraph" style:parent-style-name="Text_20_body">
      <style:text-properties style:font-name="Liberation Mono" fo:font-size="10pt" officeooo:paragraph-rsid="00147183" style:font-size-asian="10pt" style:font-size-complex="10pt"/>
    </style:style>
    <style:style style:name="P13" style:family="paragraph" style:parent-style-name="Text_20_body">
      <style:text-properties fo:color="#2a6099" loext:opacity="100%" style:font-name="Liberation Mono" fo:font-size="10pt" officeooo:paragraph-rsid="00147183" style:font-size-asian="10pt" style:font-size-complex="10pt"/>
    </style:style>
    <style:style style:name="P14" style:family="paragraph" style:parent-style-name="Heading_20_3">
      <style:text-properties officeooo:rsid="00147183" officeooo:paragraph-rsid="0016e61e"/>
    </style:style>
    <style:style style:name="P15" style:family="paragraph" style:parent-style-name="Text_20_body">
      <style:text-properties style:font-name="Liberation Mono" fo:font-size="10pt" officeooo:paragraph-rsid="0016e61e" style:font-size-asian="10pt" style:font-size-complex="10pt"/>
    </style:style>
    <style:style style:name="P16" style:family="paragraph" style:parent-style-name="Text_20_body">
      <style:text-properties fo:color="#2a6099" loext:opacity="100%" style:font-name="Liberation Mono" fo:font-size="10pt" officeooo:paragraph-rsid="0016e61e" style:font-size-asian="10pt" style:font-size-complex="10pt"/>
    </style:style>
    <style:style style:name="P17" style:family="paragraph" style:parent-style-name="Heading_20_3">
      <style:text-properties officeooo:paragraph-rsid="0016e61e"/>
    </style:style>
    <style:style style:name="P18" style:family="paragraph" style:parent-style-name="Text_20_body">
      <style:text-properties fo:color="#2a6099" loext:opacity="100%" style:font-name="Liberation Mono" fo:font-size="10pt" officeooo:paragraph-rsid="00170cfe" style:font-size-asian="10pt" style:font-size-complex="10pt"/>
    </style:style>
    <style:style style:name="P19" style:family="paragraph" style:parent-style-name="Text_20_body">
      <style:text-properties style:font-name="Liberation Mono" fo:font-size="10pt" officeooo:paragraph-rsid="00170cfe" style:font-size-asian="10pt" style:font-size-complex="10pt"/>
    </style:style>
    <style:style style:name="T1" style:family="text">
      <style:text-properties fo:background-color="#f6f9d4" loext:char-shading-value="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background-color="#ffff00" loext:char-shading-value="0"/>
    </style:style>
    <style:style style:name="T5" style:family="text">
      <style:text-properties fo:color="#2a6099" loext:opacity="100%"/>
    </style:style>
    <style:style style:name="T6" style:family="text">
      <style:text-properties officeooo:rsid="0016e61e"/>
    </style:style>
    <style:style style:name="T7" style:family="text">
      <style:text-properties officeooo:rsid="0014718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lán prací pro Hičkok</text:h>
      <text:list text:style-name="L1">
        <text:list-item>
          <text:p text:style-name="P2">Někde vyčlenit složky pro etalon 13-15 a etalon 16-18. Zkopírovat do nich soubory CoNLL-U s ruční morfologií od Staročechů. Ujistit se, že tyhle soubory jsou nějakým způsobem vyčištěné, např. neobsahují spoustu blbostí v MISC a mají jednotně dogenerované značky v XPOS. V podstatě by ty soubory měly vypadat tak, jako kdybychom je chtěli vydat.</text:p>
        </text:list-item>
        <text:list-item>
          <text:p text:style-name="P2">Podobným způsobem bych měl mít nachystaný i etalon 19, i když tam předchozí zpracování vypadalo jinak.</text:p>
        </text:list-item>
        <text:list-item>
          <text:p text:style-name="P3"><text:span text:style-name="T1">Všechny tři etalony zpracovat UDPipem natrénovaným na FicTree (resp. cs_all) z UD 2.17. UDPipe má na vstupu CoNLL-U soubory a nesmí měnit tokenizaci a segmentaci na věty.</text:span> Navíc chci, aby buď nesahal na morfologii (LEMMA, UPOS, XPOS, FEATS), nebo abych jeho výstup slil s existující ruční morfologií. Ve výsledku tedy bude segmentace, tokenizace a morfologie ruční, zatímco syntaxe bude predikovaná novočeským modelem.</text:p>
        </text:list-item>
        <text:list-item>
          <text:p text:style-name="P4">Změřit úspěšnost novočeského modelu v predikci morfologie (asi klidně na celých etalonech, se zlatou tokenizací na vstupu UDPipe; nicméně kvůli některým dalším pokusům si budu muset ještě vyčlenit menší testovací data a spočítat to i na nich).</text:p>
        </text:list-item>
        <text:list-item>
          <text:p text:style-name="P4">Na každém etalonu natrénovat nový model, který pak budeme používat k anotaci textů z příslušného období. Zlatá tokenizace a segmentace, syntaxe predikovaná novočeským modelem, morfologie zlatá. (Udělat totéž ještě i na podmnožině etalonu, která neobsahuje „testovací“ data. Čistě pro účely vyhodnocení a vzájemného srovnání modelů. Pro praktické nasazení budeme používat modely natrénované na celém etalonu.)</text:p>
          <text:list>
            <text:list-item>
              <text:p text:style-name="P5">Budu muset natrénovat i tokenizéry pomocí UDPipe 1. Jinak mi výsledný model nikdy správně neodtrhne částici <text:span text:style-name="T2">-ť</text:span><text:span text:style-name="T3">.</text:span></text:p>
            </text:list-item>
          </text:list>
        </text:list-item>
        <text:list-item>
          <text:p text:style-name="P4">Experimenty s kombinací trénovacích dat: Více etalonů dohromady, historická data v kombinaci s novočeskými daty.</text:p>
        </text:list-item>
        <text:list-item>
          <text:p text:style-name="P6">Všechny ostatní nápady, které jsme měli:</text:p>
          <text:list>
            <text:list-item>
              <text:p text:style-name="P6">Systematické vzájemné porovnání etalonů a jejich úprava, pak přetrénování všeho.</text:p>
            </text:list-item>
            <text:list-item>
              <text:p text:style-name="P6">Ruční syntaktická anotace (Bára, Lenka) a její zakomponování do modelů.</text:p>
            </text:list-item>
          </text:list>
        </text:list-item>
      </text:list>
      <text:h text:style-name="P7" text:outline-level="1">Vyhodnocení UDPipe na etalonech</text:h>
      <text:h text:style-name="P8" text:outline-level="2">Pouze test</text:h>
      <text:p text:style-name="P9">V každém etalonu se všechny jeho soubory použijí jako testovací. Aplikuje se na ně UDPipe 2 s předtrénovaným modelem cs_fictree-ud-2.17-251125, pouze tagger (tokenizaci a segmentaci dostane zlatou, parser nepouštíme a nevyhodnocujeme, protože syntaxe není zlatá ani v etalonech).</text:p>
      <text:p text:style-name="P10">Následující hodnoty byly naměřeny <text:span text:style-name="T4">5.6.2026</text:span> na takovém tvaru etalonů, který v tu chvíli existoval. Později se ještě budou etalony upravovat, takže tato čísla vyjdou jinak.</text:p>
      <text:h text:style-name="P11" text:outline-level="3">Etalon 13</text:h>
      <text:p text:style-name="P12">Metric <text:s text:c="4"/>| Precision | <text:s text:c="3"/>Recall | <text:s/>F1 Score | AligndAcc</text:p>
      <text:p text:style-name="P12"><text:soft-page-break/>-----------+-----------+-----------+-----------+-----------</text:p>
      <text:p text:style-name="P12"><text:span text:style-name="T5">UPOS <text:s text:c="6"/>| <text:s text:c="4"/>92.04 | <text:s text:c="4"/>92.04 | <text:s text:c="4"/>92.04 | <text:s text:c="4"/>92.04</text:span></text:p>
      <text:p text:style-name="P13">XPOS <text:s text:c="6"/>| <text:s text:c="4"/>43.58 | <text:s text:c="4"/>43.58 | <text:s text:c="4"/>43.58 | <text:s text:c="4"/>43.58</text:p>
      <text:p text:style-name="P13">UFeats <text:s text:c="4"/>| <text:s text:c="4"/>65.29 | <text:s text:c="4"/>65.29 | <text:s text:c="4"/>65.29 | <text:s text:c="4"/>65.29</text:p>
      <text:p text:style-name="P13">AllTags <text:s text:c="3"/>| <text:s text:c="4"/>42.76 | <text:s text:c="4"/>42.76 | <text:s text:c="4"/>42.76 | <text:s text:c="4"/>42.76</text:p>
      <text:p text:style-name="P13">Lemmas <text:s text:c="4"/>| <text:s text:c="4"/>78.55 | <text:s text:c="4"/>78.55 | <text:s text:c="4"/>78.55 | <text:s text:c="4"/>78.55</text:p>
      <text:h text:style-name="P14" text:outline-level="3">Etalon 1<text:span text:style-name="T6">6</text:span></text:h>
      <text:p text:style-name="P15">Metric <text:s text:c="4"/>| Precision | <text:s text:c="3"/>Recall | <text:s/>F1 Score | AligndAcc</text:p>
      <text:p text:style-name="P15">-----------+-----------+-----------+-----------+-----------</text:p>
      <text:p text:style-name="P16">UPOS <text:s text:c="6"/>| <text:s text:c="4"/>96.27 | <text:s text:c="4"/>96.27 | <text:s text:c="4"/>96.27 | <text:s text:c="4"/>96.27</text:p>
      <text:p text:style-name="P16">XPOS <text:s text:c="6"/>| <text:s text:c="4"/>48.61 | <text:s text:c="4"/>48.61 | <text:s text:c="4"/>48.61 | <text:s text:c="4"/>48.61</text:p>
      <text:p text:style-name="P16">UFeats <text:s text:c="4"/>| <text:s text:c="4"/>71.92 | <text:s text:c="4"/>71.92 | <text:s text:c="4"/>71.92 | <text:s text:c="4"/>71.92</text:p>
      <text:p text:style-name="P16">AllTags <text:s text:c="3"/>| <text:s text:c="4"/>47.51 | <text:s text:c="4"/>47.51 | <text:s text:c="4"/>47.51 | <text:s text:c="4"/>47.51</text:p>
      <text:p text:style-name="P16">Lemmas <text:s text:c="4"/>| <text:s text:c="4"/>90.25 | <text:s text:c="4"/>90.25 | <text:s text:c="4"/>90.25 | <text:s text:c="4"/>90.25</text:p>
      <text:h text:style-name="P17" text:outline-level="3"><text:span text:style-name="T7">Etalon 1</text:span><text:span text:style-name="T6">9</text:span></text:h>
      <text:p text:style-name="P15">Metric <text:s text:c="4"/>| Precision | <text:s text:c="3"/>Recall | <text:s/>F1 Score | AligndAcc</text:p>
      <text:p text:style-name="P15">-----------+-----------+-----------+-----------+-----------</text:p>
      <text:p text:style-name="P18">UPOS <text:s text:c="6"/>| <text:s text:c="4"/>95.10 | <text:s text:c="4"/>95.10 | <text:s text:c="4"/>95.10 | <text:s text:c="4"/>95.10</text:p>
      <text:p text:style-name="P18">XPOS <text:s text:c="6"/>| <text:s text:c="4"/>49.98 | <text:s text:c="4"/>49.98 | <text:s text:c="4"/>49.98 | <text:s text:c="4"/>49.98</text:p>
      <text:p text:style-name="P18">UFeats <text:s text:c="4"/>| <text:s text:c="4"/>76.81 | <text:s text:c="4"/>76.81 | <text:s text:c="4"/>76.81 | <text:s text:c="4"/>76.81</text:p>
      <text:p text:style-name="P18">AllTags <text:s text:c="3"/>| <text:s text:c="4"/>49.11 | <text:s text:c="4"/>49.11 | <text:s text:c="4"/>49.11 | <text:s text:c="4"/>49.11</text:p>
      <text:p text:style-name="P18">Lemmas <text:s text:c="4"/>| <text:s text:c="4"/>93.42 | <text:s text:c="4"/>93.42 | <text:s text:c="4"/>93.42 | <text:s text:c="4"/>93.42</text:p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Daniel Zeman</meta:initial-creator>
    <meta:creation-date>2026-06-04T12:59:39.964664700</meta:creation-date>
    <dc:date>2026-06-05T08:46:42.096706000</dc:date>
    <dc:creator>Daniel Zeman</dc:creator>
    <meta:editing-duration>PT10H11M27S</meta:editing-duration>
    <meta:editing-cycles>10</meta:editing-cycles>
    <meta:generator>LibreOffice/25.2.7.2$Windows_X86_64 LibreOffice_project/5cbfd1ab6520636bb5f7b99185aa69bd7456825d</meta:generator>
    <meta:document-statistic meta:table-count="0" meta:image-count="0" meta:object-count="0" meta:page-count="2" meta:paragraph-count="39" meta:word-count="551" meta:character-count="3697" meta:non-whitespace-character-count="2874"/>
  </office:meta>
</office:document-meta>
</file>