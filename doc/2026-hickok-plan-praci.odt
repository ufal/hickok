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6150" officeooo:paragraph-rsid="00116150"/>
    </style:style>
    <style:style style:name="P4" style:family="paragraph" style:parent-style-name="Text_20_body" style:list-style-name="L1">
      <style:text-properties officeooo:rsid="0011d30d" officeooo:paragraph-rsid="0011d30d" fo:background-color="#f6f9d4"/>
    </style:style>
    <style:style style:name="P5" style:family="paragraph" style:parent-style-name="Text_20_body" style:list-style-name="L1">
      <style:text-properties officeooo:rsid="00316b01" officeooo:paragraph-rsid="00316b01"/>
    </style:style>
    <style:style style:name="P6" style:family="paragraph" style:parent-style-name="Text_20_body" style:list-style-name="L1">
      <style:text-properties officeooo:rsid="001188d1" officeooo:paragraph-rsid="001188d1"/>
    </style:style>
    <style:style style:name="P7" style:family="paragraph" style:parent-style-name="Heading_20_1">
      <style:text-properties officeooo:rsid="00147183" officeooo:paragraph-rsid="00147183"/>
    </style:style>
    <style:style style:name="P8" style:family="paragraph" style:parent-style-name="Heading_20_2">
      <style:text-properties officeooo:rsid="00147183" officeooo:paragraph-rsid="00147183"/>
    </style:style>
    <style:style style:name="P9" style:family="paragraph" style:parent-style-name="Text_20_body">
      <style:text-properties officeooo:rsid="00147183" officeooo:paragraph-rsid="00147183"/>
    </style:style>
    <style:style style:name="P10" style:family="paragraph" style:parent-style-name="Text_20_body">
      <style:text-properties officeooo:rsid="001538a3" officeooo:paragraph-rsid="001538a3"/>
    </style:style>
    <style:style style:name="P11" style:family="paragraph" style:parent-style-name="Heading_20_3">
      <style:text-properties officeooo:rsid="00147183" officeooo:paragraph-rsid="00147183"/>
    </style:style>
    <style:style style:name="P12" style:family="paragraph" style:parent-style-name="Text_20_body">
      <style:text-properties style:font-name="Liberation Mono" fo:font-size="10pt" officeooo:paragraph-rsid="00147183" style:font-size-asian="10pt" style:font-size-complex="10pt"/>
    </style:style>
    <style:style style:name="P13" style:family="paragraph" style:parent-style-name="Text_20_body">
      <style:text-properties fo:color="#2a6099" loext:opacity="100%" style:font-name="Liberation Mono" fo:font-size="10pt" officeooo:paragraph-rsid="00147183" style:font-size-asian="10pt" style:font-size-complex="10pt"/>
    </style:style>
    <style:style style:name="P14" style:family="paragraph" style:parent-style-name="Heading_20_3">
      <style:text-properties officeooo:rsid="00147183" officeooo:paragraph-rsid="0016e61e"/>
    </style:style>
    <style:style style:name="P15" style:family="paragraph" style:parent-style-name="Text_20_body">
      <style:text-properties style:font-name="Liberation Mono" fo:font-size="10pt" officeooo:paragraph-rsid="0016e61e" style:font-size-asian="10pt" style:font-size-complex="10pt"/>
    </style:style>
    <style:style style:name="P16" style:family="paragraph" style:parent-style-name="Text_20_body">
      <style:text-properties fo:color="#2a6099" loext:opacity="100%" style:font-name="Liberation Mono" fo:font-size="10pt" officeooo:paragraph-rsid="0016e61e" style:font-size-asian="10pt" style:font-size-complex="10pt"/>
    </style:style>
    <style:style style:name="P17" style:family="paragraph" style:parent-style-name="Heading_20_3">
      <style:text-properties officeooo:paragraph-rsid="0016e61e"/>
    </style:style>
    <style:style style:name="P18" style:family="paragraph" style:parent-style-name="Text_20_body">
      <style:text-properties fo:color="#2a6099" loext:opacity="100%" style:font-name="Liberation Mono" fo:font-size="10pt" officeooo:paragraph-rsid="00170cfe" style:font-size-asian="10pt" style:font-size-complex="10pt"/>
    </style:style>
    <style:style style:name="P19" style:family="paragraph" style:parent-style-name="Heading_20_2">
      <style:text-properties officeooo:rsid="0017893d" officeooo:paragraph-rsid="0017893d"/>
    </style:style>
    <style:style style:name="P20" style:family="paragraph" style:parent-style-name="Text_20_body">
      <style:text-properties officeooo:rsid="0028a28b" officeooo:paragraph-rsid="0028a28b"/>
    </style:style>
    <style:style style:name="P21" style:family="paragraph" style:parent-style-name="Heading_20_3">
      <style:text-properties officeooo:rsid="0028a28b" officeooo:paragraph-rsid="0028a28b"/>
    </style:style>
    <style:style style:name="P22" style:family="paragraph" style:parent-style-name="Text_20_body">
      <style:text-properties officeooo:rsid="0017893d" officeooo:paragraph-rsid="0017893d"/>
    </style:style>
    <style:style style:name="P23" style:family="paragraph" style:parent-style-name="Text_20_body">
      <style:text-properties fo:language="cs" fo:country="CZ" officeooo:rsid="001d4ded" officeooo:paragraph-rsid="001d4ded"/>
    </style:style>
    <style:style style:name="P24" style:family="paragraph" style:parent-style-name="Text_20_body">
      <style:text-properties style:font-name="Liberation Mono" fo:font-size="10pt" officeooo:paragraph-rsid="00293f68" style:font-size-asian="10pt" style:font-size-complex="10pt"/>
    </style:style>
    <style:style style:name="P25" style:family="paragraph" style:parent-style-name="Text_20_body">
      <style:text-properties fo:color="#2a6099" loext:opacity="100%" style:font-name="Liberation Mono" fo:font-size="10pt" officeooo:paragraph-rsid="00293f68" style:font-size-asian="10pt" style:font-size-complex="10pt"/>
    </style:style>
    <style:style style:name="P26" style:family="paragraph" style:parent-style-name="Text_20_body">
      <style:text-properties officeooo:rsid="002b3eb0" officeooo:paragraph-rsid="002b3eb0"/>
    </style:style>
    <style:style style:name="P27" style:family="paragraph" style:parent-style-name="Text_20_body">
      <style:text-properties style:font-name="Liberation Mono" fo:font-size="10pt" officeooo:paragraph-rsid="002b3eb0" style:font-size-asian="10pt" style:font-size-complex="10pt"/>
    </style:style>
    <style:style style:name="P28" style:family="paragraph" style:parent-style-name="Text_20_body">
      <style:text-properties fo:color="#ff4000" loext:opacity="100%" style:font-name="Liberation Mono" fo:font-size="10pt" officeooo:paragraph-rsid="002b3eb0" style:font-size-asian="10pt" style:font-size-complex="10pt"/>
    </style:style>
    <style:style style:name="P29" style:family="paragraph" style:parent-style-name="Text_20_body">
      <style:text-properties officeooo:rsid="002b3eb0" officeooo:paragraph-rsid="002cf2e0"/>
    </style:style>
    <style:style style:name="P30" style:family="paragraph" style:parent-style-name="Text_20_body">
      <style:text-properties style:font-name="Liberation Mono" fo:font-size="10pt" officeooo:paragraph-rsid="002cf2e0" style:font-size-asian="10pt" style:font-size-complex="10pt"/>
    </style:style>
    <style:style style:name="P31" style:family="paragraph" style:parent-style-name="Text_20_body">
      <style:text-properties fo:color="#2a6099" loext:opacity="100%" style:font-name="Liberation Mono" fo:font-size="10pt" officeooo:paragraph-rsid="002cf2e0" style:font-size-asian="10pt" style:font-size-complex="10pt"/>
    </style:style>
    <style:style style:name="P32" style:family="paragraph" style:parent-style-name="Heading_20_3">
      <style:text-properties officeooo:paragraph-rsid="002cf2e0"/>
    </style:style>
    <style:style style:name="P33" style:family="paragraph" style:parent-style-name="Text_20_body">
      <style:text-properties fo:language="cs" fo:country="CZ" officeooo:rsid="00202631" officeooo:paragraph-rsid="00202631"/>
    </style:style>
    <style:style style:name="P34" style:family="paragraph" style:parent-style-name="Text_20_body">
      <style:text-properties fo:language="cs" fo:country="CZ" fo:font-weight="bold" officeooo:rsid="0021aee3" officeooo:paragraph-rsid="0021aee3" style:font-weight-asian="bold" style:font-weight-complex="bold"/>
    </style:style>
    <style:style style:name="P35" style:family="paragraph" style:parent-style-name="Text_20_body">
      <style:text-properties officeooo:rsid="002b3eb0" officeooo:paragraph-rsid="002c444a"/>
    </style:style>
    <style:style style:name="P36" style:family="paragraph" style:parent-style-name="Text_20_body">
      <style:text-properties style:font-name="Liberation Mono" fo:font-size="10pt" officeooo:paragraph-rsid="002c444a" style:font-size-asian="10pt" style:font-size-complex="10pt"/>
    </style:style>
    <style:style style:name="P37" style:family="paragraph" style:parent-style-name="Text_20_body">
      <style:text-properties fo:color="#2a6099" loext:opacity="100%" style:font-name="Liberation Mono" fo:font-size="10pt" officeooo:paragraph-rsid="002c444a" style:font-size-asian="10pt" style:font-size-complex="10pt"/>
    </style:style>
    <style:style style:name="P38" style:family="paragraph" style:parent-style-name="Text_20_body">
      <style:text-properties officeooo:rsid="002b3eb0" officeooo:paragraph-rsid="002eaad6"/>
    </style:style>
    <style:style style:name="P39" style:family="paragraph" style:parent-style-name="Text_20_body">
      <style:text-properties style:font-name="Liberation Mono" fo:font-size="10pt" officeooo:paragraph-rsid="002eaad6" style:font-size-asian="10pt" style:font-size-complex="10pt"/>
    </style:style>
    <style:style style:name="P40" style:family="paragraph" style:parent-style-name="Text_20_body">
      <style:text-properties fo:color="#ff4000" loext:opacity="100%" style:font-name="Liberation Mono" fo:font-size="10pt" officeooo:paragraph-rsid="002eaad6" style:font-size-asian="10pt" style:font-size-complex="10pt"/>
    </style:style>
    <style:style style:name="P41" style:family="paragraph" style:parent-style-name="Text_20_body">
      <style:text-properties officeooo:paragraph-rsid="002eaad6"/>
    </style:style>
    <style:style style:name="P42" style:family="paragraph" style:parent-style-name="Text_20_body">
      <style:text-properties fo:color="#2a6099" loext:opacity="100%" style:font-name="Liberation Mono" fo:font-size="10pt" officeooo:paragraph-rsid="002f71d8" style:font-size-asian="10pt" style:font-size-complex="10pt"/>
    </style:style>
    <style:style style:name="P43" style:family="paragraph" style:parent-style-name="Heading_20_3">
      <style:text-properties officeooo:paragraph-rsid="002eaad6"/>
    </style:style>
    <style:style style:name="P44" style:family="paragraph" style:parent-style-name="Text_20_body">
      <style:text-properties fo:language="cs" fo:country="CZ" fo:font-weight="bold" officeooo:rsid="002444ee" officeooo:paragraph-rsid="002444ee" style:font-weight-asian="bold" style:font-weight-complex="bold"/>
    </style:style>
    <style:style style:name="P45" style:family="paragraph" style:parent-style-name="Text_20_body">
      <style:text-properties fo:language="cs" fo:country="CZ" fo:font-weight="bold" officeooo:rsid="0026f315" officeooo:paragraph-rsid="0026f315" style:font-weight-asian="bold" style:font-weight-complex="bold"/>
    </style:style>
    <style:style style:name="P46" style:family="paragraph" style:parent-style-name="Text_20_body">
      <style:text-properties officeooo:rsid="002b3eb0" officeooo:paragraph-rsid="002ca51d"/>
    </style:style>
    <style:style style:name="P47" style:family="paragraph" style:parent-style-name="Text_20_body">
      <style:text-properties style:font-name="Liberation Mono" fo:font-size="10pt" officeooo:paragraph-rsid="002ca51d" style:font-size-asian="10pt" style:font-size-complex="10pt"/>
    </style:style>
    <style:style style:name="P48" style:family="paragraph" style:parent-style-name="Text_20_body">
      <style:text-properties fo:color="#2a6099" loext:opacity="100%" style:font-name="Liberation Mono" fo:font-size="10pt" officeooo:paragraph-rsid="002ca51d" style:font-size-asian="10pt" style:font-size-complex="10pt"/>
    </style:style>
    <style:style style:name="P49" style:family="paragraph" style:parent-style-name="Text_20_body">
      <style:text-properties officeooo:rsid="002b3eb0" officeooo:paragraph-rsid="002f71d8"/>
    </style:style>
    <style:style style:name="P50" style:family="paragraph" style:parent-style-name="Text_20_body">
      <style:text-properties style:font-name="Liberation Mono" fo:font-size="10pt" officeooo:paragraph-rsid="002f71d8" style:font-size-asian="10pt" style:font-size-complex="10pt"/>
    </style:style>
    <style:style style:name="P51" style:family="paragraph" style:parent-style-name="Text_20_body">
      <style:text-properties officeooo:paragraph-rsid="002f71d8"/>
    </style:style>
    <style:style style:name="P52" style:family="paragraph" style:parent-style-name="Text_20_body">
      <style:text-properties fo:color="#ff4000" loext:opacity="100%" style:font-name="Liberation Mono" fo:font-size="10pt" officeooo:paragraph-rsid="002f71d8" style:font-size-asian="10pt" style:font-size-complex="10pt"/>
    </style:style>
    <style:style style:name="T1" style:family="text">
      <style:text-properties fo:background-color="#f6f9d4" loext:char-shading-value="0"/>
    </style:style>
    <style:style style:name="T2" style:family="text">
      <style:text-properties fo:background-color="#f6f9d4" loext:char-shading-value="0"/>
    </style:style>
    <style:style style:name="T3" style:family="text">
      <style:text-properties officeooo:rsid="001c16f1" fo:background-color="#ffff00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6e61e"/>
    </style:style>
    <style:style style:name="T9" style:family="text">
      <style:text-properties officeooo:rsid="00147183"/>
    </style:style>
    <style:style style:name="T10" style:family="text">
      <style:text-properties officeooo:rsid="0028a28b"/>
    </style:style>
    <style:style style:name="T11" style:family="text">
      <style:text-properties fo:font-weight="bold" officeooo:rsid="0028a28b" style:font-weight-asian="bold" style:font-weight-complex="bold"/>
    </style:style>
    <style:style style:name="T12" style:family="text">
      <style:text-properties fo:font-weight="bold" officeooo:rsid="0024c0c2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7988f"/>
    </style:style>
    <style:style style:name="T15" style:family="text">
      <style:text-properties officeooo:rsid="0017b6e9"/>
    </style:style>
    <style:style style:name="T16" style:family="text">
      <style:text-properties fo:language="en" fo:country="US" officeooo:rsid="0019bf0d"/>
    </style:style>
    <style:style style:name="T17" style:family="text">
      <style:text-properties fo:language="cs" fo:country="CZ" officeooo:rsid="0019bf0d"/>
    </style:style>
    <style:style style:name="T18" style:family="text">
      <style:text-properties fo:language="cs" fo:country="CZ" officeooo:rsid="0028a28b"/>
    </style:style>
    <style:style style:name="T19" style:family="text">
      <style:text-properties officeooo:rsid="001f4922"/>
    </style:style>
    <style:style style:name="T20" style:family="text">
      <style:text-properties officeooo:rsid="002cf2e0"/>
    </style:style>
    <style:style style:name="T21" style:family="text">
      <style:text-properties officeooo:rsid="002eaad6"/>
    </style:style>
    <style:style style:name="T22" style:family="text">
      <style:text-properties fo:font-weight="bold" officeooo:rsid="00262299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1aee3" style:font-weight-asian="normal" style:font-weight-complex="normal"/>
    </style:style>
    <style:style style:name="T25" style:family="text">
      <style:text-properties officeooo:rsid="00262299"/>
    </style:style>
    <style:style style:name="T26" style:family="text">
      <style:text-properties fo:font-weight="normal" officeooo:rsid="002273f2" style:font-weight-asian="normal" style:font-weight-complex="normal"/>
    </style:style>
    <style:style style:name="T27" style:family="text">
      <style:text-properties officeooo:rsid="002b3eb0"/>
    </style:style>
    <style:style style:name="T28" style:family="text">
      <style:text-properties fo:font-weight="normal" officeooo:rsid="0026f31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2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3"><text:span text:style-name="T1">Změřit úspěšnost novočeského modelu v predikci morfologie (asi klidně na celých etalonech, se zlatou tokenizací na vstupu UDPipe</text:span><text:span text:style-name="T2">; nicméně kvůli některým dalším pokusům si budu muset ještě vyčlenit menší testovací data a spočítat to i na nich).</text:span></text:p>
        </text:list-item>
        <text:list-item>
          <text:p text:style-name="P3"><text:span text:style-name="T2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</text:span> Pro praktické nasazení budeme používat modely natrénované na celém etalonu. <text:span text:style-name="T3">Ale budu se muset zeptat Milana, jestli např. můžu při trénování dodat jen trénovací a žádná vývojová data.</text:span>)</text:p>
          <text:list>
            <text:list-item>
              <text:p text:style-name="P4">Budu muset natrénovat i tokenizéry pomocí UDPipe 1. Jinak mi výsledný model nikdy správně neodtrhne částici <text:span text:style-name="T4">-ť</text:span><text:span text:style-name="T5">.</text:span></text:p>
            </text:list-item>
          </text:list>
        </text:list-item>
        <text:list-item>
          <text:p text:style-name="P5">Označkovat monitorovací korpus etalonovými modely. <text:span text:style-name="T6">Na to by se hodilo rozchodit inferenční server na clusteru s grafickou kartou, aby to nebylo tak pomalé.</text:span></text:p>
        </text:list-item>
        <text:list-item>
          <text:p text:style-name="P3">Experimenty s kombinací trénovacích dat: Více etalonů dohromady, historická data v kombinaci s novočeskými daty.</text:p>
        </text:list-item>
        <text:list-item>
          <text:p text:style-name="P6">Všechny ostatní nápady, které jsme měli:</text:p>
          <text:list>
            <text:list-item>
              <text:p text:style-name="P6">Systematické vzájemné porovnání etalonů a jejich úprava, pak přetrénování všeho.</text:p>
            </text:list-item>
            <text:list-item>
              <text:p text:style-name="P6">Ruční syntaktická anotace (Bára, Lenka) a její zakomponování do modelů.</text:p>
            </text:list-item>
          </text:list>
        </text:list-item>
      </text:list>
      <text:h text:style-name="P7" text:outline-level="1">Vyhodnocení UDPipe na etalonech</text:h>
      <text:h text:style-name="P8" text:outline-level="2">Pouze test</text:h>
      <text:p text:style-name="P9">V každém etalonu se všechny jeho soubory použijí jako testovací. Aplikuje se na ně UDPipe 2 s předtrénovaným modelem cs_fictree-ud-2.17-251125, pouze tagger (tokenizaci a segmentaci dostane zlatou, parser nepouštíme a nevyhodnocujeme, protože syntaxe není zlatá ani v etalonech).</text:p>
      <text:p text:style-name="P10"><text:soft-page-break/>Následující hodnoty byly naměřeny <text:span text:style-name="T7">5.6.2026</text:span> na takovém tvaru etalonů, který v tu chvíli existoval. Později se ještě budou etalony upravovat, takže tato čísla vyjdou jinak.</text:p>
      <text:h text:style-name="P11" text:outline-level="3">Etalon 13</text:h>
      <text:p text:style-name="P12">Metric <text:s text:c="4"/>| Precision | <text:s text:c="3"/>Recall | <text:s/>F1 Score | AligndAcc</text:p>
      <text:p text:style-name="P12">-----------+-----------+-----------+-----------+-----------</text:p>
      <text:p text:style-name="P13">UPOS <text:s text:c="6"/>| <text:s text:c="4"/>92.04 | <text:s text:c="4"/>92.04 | <text:s text:c="4"/>92.04 | <text:s text:c="4"/>92.04</text:p>
      <text:p text:style-name="P13">XPOS <text:s text:c="6"/>| <text:s text:c="4"/>43.58 | <text:s text:c="4"/>43.58 | <text:s text:c="4"/>43.58 | <text:s text:c="4"/>43.58</text:p>
      <text:p text:style-name="P13">UFeats <text:s text:c="4"/>| <text:s text:c="4"/>65.29 | <text:s text:c="4"/>65.29 | <text:s text:c="4"/>65.29 | <text:s text:c="4"/>65.29</text:p>
      <text:p text:style-name="P13">AllTags <text:s text:c="3"/>| <text:s text:c="4"/>42.76 | <text:s text:c="4"/>42.76 | <text:s text:c="4"/>42.76 | <text:s text:c="4"/>42.76</text:p>
      <text:p text:style-name="P13">Lemmas <text:s text:c="4"/>| <text:s text:c="4"/>78.55 | <text:s text:c="4"/>78.55 | <text:s text:c="4"/>78.55 | <text:s text:c="4"/>78.55</text:p>
      <text:h text:style-name="P14" text:outline-level="3">Etalon 1<text:span text:style-name="T8">6</text:span></text:h>
      <text:p text:style-name="P15">Metric <text:s text:c="4"/>| Precision | <text:s text:c="3"/>Recall | <text:s/>F1 Score | AligndAcc</text:p>
      <text:p text:style-name="P15">-----------+-----------+-----------+-----------+-----------</text:p>
      <text:p text:style-name="P16">UPOS <text:s text:c="6"/>| <text:s text:c="4"/>96.27 | <text:s text:c="4"/>96.27 | <text:s text:c="4"/>96.27 | <text:s text:c="4"/>96.27</text:p>
      <text:p text:style-name="P16">XPOS <text:s text:c="6"/>| <text:s text:c="4"/>48.61 | <text:s text:c="4"/>48.61 | <text:s text:c="4"/>48.61 | <text:s text:c="4"/>48.61</text:p>
      <text:p text:style-name="P16">UFeats <text:s text:c="4"/>| <text:s text:c="4"/>71.92 | <text:s text:c="4"/>71.92 | <text:s text:c="4"/>71.92 | <text:s text:c="4"/>71.92</text:p>
      <text:p text:style-name="P16">AllTags <text:s text:c="3"/>| <text:s text:c="4"/>47.51 | <text:s text:c="4"/>47.51 | <text:s text:c="4"/>47.51 | <text:s text:c="4"/>47.51</text:p>
      <text:p text:style-name="P16">Lemmas <text:s text:c="4"/>| <text:s text:c="4"/>90.25 | <text:s text:c="4"/>90.25 | <text:s text:c="4"/>90.25 | <text:s text:c="4"/>90.25</text:p>
      <text:h text:style-name="P17" text:outline-level="3"><text:span text:style-name="T9">Etalon 1</text:span><text:span text:style-name="T8">9</text:span></text:h>
      <text:p text:style-name="P15">Metric <text:s text:c="4"/>| Precision | <text:s text:c="3"/>Recall | <text:s/>F1 Score | AligndAcc</text:p>
      <text:p text:style-name="P15">-----------+-----------+-----------+-----------+-----------</text:p>
      <text:p text:style-name="P18">UPOS <text:s text:c="6"/>| <text:s text:c="4"/>95.10 | <text:s text:c="4"/>95.10 | <text:s text:c="4"/>95.10 | <text:s text:c="4"/>95.10</text:p>
      <text:p text:style-name="P18">XPOS <text:s text:c="6"/>| <text:s text:c="4"/>49.98 | <text:s text:c="4"/>49.98 | <text:s text:c="4"/>49.98 | <text:s text:c="4"/>49.98</text:p>
      <text:p text:style-name="P18">UFeats <text:s text:c="4"/>| <text:s text:c="4"/>76.81 | <text:s text:c="4"/>76.81 | <text:s text:c="4"/>76.81 | <text:s text:c="4"/>76.81</text:p>
      <text:p text:style-name="P18">AllTags <text:s text:c="3"/>| <text:s text:c="4"/>49.11 | <text:s text:c="4"/>49.11 | <text:s text:c="4"/>49.11 | <text:s text:c="4"/>49.11</text:p>
      <text:p text:style-name="P18">Lemmas <text:s text:c="4"/>| <text:s text:c="4"/>93.42 | <text:s text:c="4"/>93.42 | <text:s text:c="4"/>93.42 | <text:s text:c="4"/>93.42</text:p>
      <text:h text:style-name="P19" text:outline-level="2">Kandidáti na <text:span text:style-name="T10">dev a </text:span>test</text:h>
      <text:p text:style-name="P20">Pro trénování modelu je možná nezbytné mít dev data (i kdyby UDPipe přežil, že mu je nedám, stejně by si je asi musel vytvořit z části trénovacích dat) a na vyhodnocení nových modelů samozřejmě potřebuju i testovací data. Beru celé dokumenty, snažím se o průřez celým časovým obdobím daného etalonu i o trochu různé žánry. V budoucnosti se výběr může změnit třeba i s ohledem na to, které soubory budou mít ruční syntaktickou anotaci, ale zatím (5.6.2026) dělám pokusy s následujícím dělením:</text:p>
      <text:h text:style-name="P21" text:outline-level="3"><text:soft-page-break/>Etalon 13</text:h>
      <text:p text:style-name="P22"><text:span text:style-name="T11">D</text:span><text:span text:style-name="T12">ev</text:span><text:span text:style-name="T13">:</text:span> 005_umuc_rajhr (veršovaný, 1350), <text:span text:style-name="T14">017_pas_muz_a (druhá půlka 14. stol., život svatého Mauricia)., </text:span><text:span text:style-name="T15">030_lek_frant_muz (lékařský spis, 1444), </text:span><text:span text:style-name="T16">040_let_a </text:span><text:span text:style-name="T17">(letopisy, 1475) … </text:span><text:span text:style-name="T18">9558 slov.</text:span></text:p>
      <text:p text:style-name="P23"><text:span text:style-name="T11">T</text:span><text:span text:style-name="T12">est</text:span><text:span text:style-name="T13">:</text:span> 010_bibl_drazd_mt (<text:span text:style-name="T19">1365, </text:span>část Matoušova evangelia v Bibli drážďanské), <text:span text:style-name="T19">019_rada_otc_r (konec 14. století, rada otce synovi), 033_prav_svab_c (1448, právní sborník)</text:span>, 042_pov_ol (druhá půlka 15. stol., Olomoucké povídky) … <text:span text:style-name="T10">9358 slov.</text:span></text:p>
      <text:p text:style-name="P24">Metric <text:s text:c="4"/>| Precision | <text:s text:c="3"/>Recall | <text:s/>F1 Score | AligndAcc</text:p>
      <text:p text:style-name="P24">-----------+-----------+-----------+-----------+-----------</text:p>
      <text:p text:style-name="P25">UPOS <text:s text:c="6"/>| <text:s text:c="4"/>92.64 | <text:s text:c="4"/>92.64 | <text:s text:c="4"/>92.64 | <text:s text:c="4"/>92.64</text:p>
      <text:p text:style-name="P25">XPOS <text:s text:c="6"/>| <text:s text:c="4"/>43.16 | <text:s text:c="4"/>43.16 | <text:s text:c="4"/>43.16 | <text:s text:c="4"/>43.16</text:p>
      <text:p text:style-name="P25">UFeats <text:s text:c="4"/>| <text:s text:c="4"/>65.77 | <text:s text:c="4"/>65.77 | <text:s text:c="4"/>65.77 | <text:s text:c="4"/>65.77</text:p>
      <text:p text:style-name="P25">AllTags <text:s text:c="3"/>| <text:s text:c="4"/>42.19 | <text:s text:c="4"/>42.19 | <text:s text:c="4"/>42.19 | <text:s text:c="4"/>42.19</text:p>
      <text:p text:style-name="P25">Lemmas <text:s text:c="4"/>| <text:s text:c="4"/>78.19 | <text:s text:c="4"/>78.19 | <text:s text:c="4"/>78.19 | <text:s text:c="4"/>78.19</text:p>
      <text:p text:style-name="P26">To nahoře je pomocí modelu FicTree 2.17. To dole je pomocí mého modelu natrénovaného na Etalonu 13.</text:p>
      <text:p text:style-name="P27">Metric <text:s text:c="4"/>| Precision | <text:s text:c="3"/>Recall | <text:s/>F1 Score | AligndAcc</text:p>
      <text:p text:style-name="P27">-----------+-----------+-----------+-----------+-----------</text:p>
      <text:p text:style-name="P28">UPOS <text:s text:c="6"/>| <text:s text:c="4"/>97.87 | <text:s text:c="4"/>97.87 | <text:s text:c="4"/>97.87 | <text:s text:c="4"/>97.87</text:p>
      <text:p text:style-name="P28">XPOS <text:s text:c="6"/>| <text:s text:c="4"/>92.73 | <text:s text:c="4"/>92.73 | <text:s text:c="4"/>92.73 | <text:s text:c="4"/>92.73</text:p>
      <text:p text:style-name="P28">UFeats <text:s text:c="4"/>| <text:s text:c="4"/>92.72 | <text:s text:c="4"/>92.72 | <text:s text:c="4"/>92.72 | <text:s text:c="4"/>92.72</text:p>
      <text:p text:style-name="P28">AllTags <text:s text:c="3"/>| <text:s text:c="4"/>91.91 | <text:s text:c="4"/>91.91 | <text:s text:c="4"/>91.91 | <text:s text:c="4"/>91.91</text:p>
      <text:p text:style-name="P28">Lemmas <text:s text:c="4"/>| <text:s text:c="4"/>95.47 | <text:s text:c="4"/>95.47 | <text:s text:c="4"/>95.47 | <text:s text:c="4"/>95.47</text:p>
      <text:p text:style-name="P29"><text:span text:style-name="T20">Teď</text:span> pomocí mého modelu natrénovaného na Etalonu 1<text:span text:style-name="T20">6</text:span>.</text:p>
      <text:p text:style-name="P30">Metric <text:s text:c="4"/>| Precision | <text:s text:c="3"/>Recall | <text:s/>F1 Score | AligndAcc</text:p>
      <text:p text:style-name="P30">-----------+-----------+-----------+-----------+-----------</text:p>
      <text:p text:style-name="P31">UPOS <text:s text:c="6"/>| <text:s text:c="4"/>95.58 | <text:s text:c="4"/>95.58 | <text:s text:c="4"/>95.58 | <text:s text:c="4"/>95.58</text:p>
      <text:p text:style-name="P31">XPOS <text:s text:c="6"/>| <text:s text:c="4"/>86.47 | <text:s text:c="4"/>86.47 | <text:s text:c="4"/>86.47 | <text:s text:c="4"/>86.47</text:p>
      <text:p text:style-name="P31">UFeats <text:s text:c="4"/>| <text:s text:c="4"/>86.75 | <text:s text:c="4"/>86.75 | <text:s text:c="4"/>86.75 | <text:s text:c="4"/>86.75</text:p>
      <text:p text:style-name="P31">AllTags <text:s text:c="3"/>| <text:s text:c="4"/>85.50 | <text:s text:c="4"/>85.50 | <text:s text:c="4"/>85.50 | <text:s text:c="4"/>85.50</text:p>
      <text:p text:style-name="P31">Lemmas <text:s text:c="4"/>| <text:s text:c="4"/>86.89 | <text:s text:c="4"/>86.89 | <text:s text:c="4"/>86.89 | <text:s text:c="4"/>86.89</text:p>
      <text:p text:style-name="P29"><text:span text:style-name="T20">Teď</text:span> pomocí mého modelu natrénovaného na Etalonu 1<text:span text:style-name="T21">9</text:span>.</text:p>
      <text:p text:style-name="P30">Metric <text:s text:c="4"/>| Precision | <text:s text:c="3"/>Recall | <text:s/>F1 Score | AligndAcc</text:p>
      <text:p text:style-name="P30">-----------+-----------+-----------+-----------+-----------</text:p>
      <text:p text:style-name="P31">UPOS <text:s text:c="6"/>| <text:s text:c="4"/>93.43 | <text:s text:c="4"/>93.43 | <text:s text:c="4"/>93.43 | <text:s text:c="4"/>93.43</text:p>
      <text:p text:style-name="P31">XPOS <text:s text:c="6"/>| <text:s text:c="4"/>77.37 | <text:s text:c="4"/>77.37 | <text:s text:c="4"/>77.37 | <text:s text:c="4"/>77.37</text:p>
      <text:p text:style-name="P31">UFeats <text:s text:c="4"/>| <text:s text:c="4"/>77.87 | <text:s text:c="4"/>77.87 | <text:s text:c="4"/>77.87 | <text:s text:c="4"/>77.87</text:p>
      <text:p text:style-name="P31"><text:soft-page-break/>AllTags <text:s text:c="3"/>| <text:s text:c="4"/>75.81 | <text:s text:c="4"/>75.81 | <text:s text:c="4"/>75.81 | <text:s text:c="4"/>75.81</text:p>
      <text:p text:style-name="P31">Lemmas <text:s text:c="4"/>| <text:s text:c="4"/>80.03 | <text:s text:c="4"/>80.03 | <text:s text:c="4"/>80.03 | <text:s text:c="4"/>80.03</text:p>
      <text:h text:style-name="P32" text:outline-level="3"><text:span text:style-name="T10">Etalon 16</text:span></text:h>
      <text:p text:style-name="P33"><text:span text:style-name="T11">D</text:span><text:span text:style-name="T22">ev</text:span><text:span text:style-name="T13">:</text:span><text:span text:style-name="T23"> </text:span><text:span text:style-name="T24">049_frantovy_prava (1518), 065_o_ctnych_manzelkach_tehotnych (1615), 076_smol_jimr (soudní zápis, 1726) … 9691 slov.</text:span></text:p>
      <text:p text:style-name="P34"><text:span text:style-name="T10">T</text:span><text:span text:style-name="T25">est</text:span>:<text:span text:style-name="T23"> 050_hanus (1538), </text:span><text:span text:style-name="T26">063_div_velik (1612), 080_pranostika_nova (1766) … 9556 slov.</text:span></text:p>
      <text:p text:style-name="P24">Metric <text:s text:c="4"/>| Precision | <text:s text:c="3"/>Recall | <text:s/>F1 Score | AligndAcc</text:p>
      <text:p text:style-name="P24">-----------+-----------+-----------+-----------+-----------</text:p>
      <text:p text:style-name="P25">UPOS <text:s text:c="6"/>| <text:s text:c="4"/>96.66 | <text:s text:c="4"/>96.66 | <text:s text:c="4"/>96.66 | <text:s text:c="4"/>96.66</text:p>
      <text:p text:style-name="P25">XPOS <text:s text:c="6"/>| <text:s text:c="4"/>50.63 | <text:s text:c="4"/>50.63 | <text:s text:c="4"/>50.63 | <text:s text:c="4"/>50.63</text:p>
      <text:p text:style-name="P25">UFeats <text:s text:c="4"/>| <text:s text:c="4"/>72.71 | <text:s text:c="4"/>72.71 | <text:s text:c="4"/>72.71 | <text:s text:c="4"/>72.71</text:p>
      <text:p text:style-name="P25">AllTags <text:s text:c="3"/>| <text:s text:c="4"/>49.35 | <text:s text:c="4"/>49.35 | <text:s text:c="4"/>49.35 | <text:s text:c="4"/>49.35</text:p>
      <text:p text:style-name="P25">Lemmas <text:s text:c="4"/>| <text:s text:c="4"/>91.72 | <text:s text:c="4"/>91.72 | <text:s text:c="4"/>91.72 | <text:s text:c="4"/>91.72</text:p>
      <text:p text:style-name="P35">To nahoře je pomocí modelu FicTree 2.17. To dole je pomocí mého modelu natrénovaného na Etalonu 13.</text:p>
      <text:p text:style-name="P36">Metric <text:s text:c="4"/>| Precision | <text:s text:c="3"/>Recall | <text:s/>F1 Score | AligndAcc</text:p>
      <text:p text:style-name="P36">-----------+-----------+-----------+-----------+-----------</text:p>
      <text:p text:style-name="P37">UPOS <text:s text:c="6"/>| <text:s text:c="4"/>97.98 | <text:s text:c="4"/>97.98 | <text:s text:c="4"/>97.98 | <text:s text:c="4"/>97.98</text:p>
      <text:p text:style-name="P37">XPOS <text:s text:c="6"/>| <text:s text:c="4"/>89.88 | <text:s text:c="4"/>89.88 | <text:s text:c="4"/>89.88 | <text:s text:c="4"/>89.88</text:p>
      <text:p text:style-name="P37">UFeats <text:s text:c="4"/>| <text:s text:c="4"/>90.00 | <text:s text:c="4"/>90.00 | <text:s text:c="4"/>90.00 | <text:s text:c="4"/>90.00</text:p>
      <text:p text:style-name="P37">AllTags <text:s text:c="3"/>| <text:s text:c="4"/>88.92 | <text:s text:c="4"/>88.92 | <text:s text:c="4"/>88.92 | <text:s text:c="4"/>88.92</text:p>
      <text:p text:style-name="P37">Lemmas <text:s text:c="4"/>| <text:s text:c="4"/>91.86 | <text:s text:c="4"/>91.86 | <text:s text:c="4"/>91.86 | <text:s text:c="4"/>91.86</text:p>
      <text:p text:style-name="P38"><text:span text:style-name="T20">Teď</text:span> pomocí mého modelu natrénovaného na Etalonu 1<text:span text:style-name="T20">6</text:span>.</text:p>
      <text:p text:style-name="P39">Metric <text:s text:c="4"/>| Precision | <text:s text:c="3"/>Recall | <text:s/>F1 Score | AligndAcc</text:p>
      <text:p text:style-name="P39">-----------+-----------+-----------+-----------+-----------</text:p>
      <text:p text:style-name="P40">UPOS <text:s text:c="6"/>| <text:s text:c="4"/>98.67 | <text:s text:c="4"/>98.67 | <text:s text:c="4"/>98.67 | <text:s text:c="4"/>98.67</text:p>
      <text:p text:style-name="P40">XPOS <text:s text:c="6"/>| <text:s text:c="4"/>93.79 | <text:s text:c="4"/>93.79 | <text:s text:c="4"/>93.79 | <text:s text:c="4"/>93.79</text:p>
      <text:p text:style-name="P40">UFeats <text:s text:c="4"/>| <text:s text:c="4"/>93.78 | <text:s text:c="4"/>93.78 | <text:s text:c="4"/>93.78 | <text:s text:c="4"/>93.78</text:p>
      <text:p text:style-name="P40">AllTags <text:s text:c="3"/>| <text:s text:c="4"/>92.96 | <text:s text:c="4"/>92.96 | <text:s text:c="4"/>92.96 | <text:s text:c="4"/>92.96</text:p>
      <text:p text:style-name="P40">Lemmas <text:s text:c="4"/>| <text:s text:c="4"/>95.37 | <text:s text:c="4"/>95.37 | <text:s text:c="4"/>95.37 | <text:s text:c="4"/>95.37</text:p>
      <text:p text:style-name="P41"><text:span text:style-name="T20">Teď</text:span><text:span text:style-name="T27"> pomocí mého modelu natrénovaného na Etalonu 1</text:span><text:span text:style-name="T21">9</text:span><text:span text:style-name="T27">.</text:span></text:p>
      <text:p text:style-name="P39">Metric <text:s text:c="4"/>| Precision | <text:s text:c="3"/>Recall | <text:s/>F1 Score | AligndAcc</text:p>
      <text:p text:style-name="P39">-----------+-----------+-----------+-----------+-----------</text:p>
      <text:p text:style-name="P42">UPOS <text:s text:c="6"/>| <text:s text:c="4"/>97.21 | <text:s text:c="4"/>97.21 | <text:s text:c="4"/>97.21 | <text:s text:c="4"/>97.21</text:p>
      <text:p text:style-name="P42">XPOS <text:s text:c="6"/>| <text:s text:c="4"/>85.48 | <text:s text:c="4"/>85.48 | <text:s text:c="4"/>85.48 | <text:s text:c="4"/>85.48</text:p>
      <text:p text:style-name="P42">UFeats <text:s text:c="4"/>| <text:s text:c="4"/>84.22 | <text:s text:c="4"/>84.22 | <text:s text:c="4"/>84.22 | <text:s text:c="4"/>84.22</text:p>
      <text:p text:style-name="P42"><text:soft-page-break/>AllTags <text:s text:c="3"/>| <text:s text:c="4"/>83.25 | <text:s text:c="4"/>83.25 | <text:s text:c="4"/>83.25 | <text:s text:c="4"/>83.25</text:p>
      <text:p text:style-name="P42">Lemmas <text:s text:c="4"/>| <text:s text:c="4"/>92.65 | <text:s text:c="4"/>92.65 | <text:s text:c="4"/>92.65 | <text:s text:c="4"/>92.65</text:p>
      <text:h text:style-name="P43" text:outline-level="3"><text:span text:style-name="T10">Etalon 19</text:span></text:h>
      <text:p text:style-name="P44"><text:span text:style-name="T10">D</text:span><text:span text:style-name="T25">ev</text:span>:<text:span text:style-name="T23"> 1802_krameriusovy_noviny_21.8.1802, 1832_svihlik_edmund_a_belinka, 1855_stroupeznicka_boure, </text:span><text:span text:style-name="T28">1869_jaros_z_chladku … 8897 slov.</text:span></text:p>
      <text:p text:style-name="P45"><text:span text:style-name="T10">T</text:span>est:<text:span text:style-name="T23"> 1808_kramerius_vyd_rozlicne_povidacky, 1827_rettigova_bila_ruze, 1846_prazske_noviny_19.3.1846, 1874_palacky_nejnovejsi_politicke_uvahy … 8891 slov.</text:span></text:p>
      <text:p text:style-name="P24">Metric <text:s text:c="4"/>| Precision | <text:s text:c="3"/>Recall | <text:s/>F1 Score | AligndAcc</text:p>
      <text:p text:style-name="P24">-----------+-----------+-----------+-----------+-----------</text:p>
      <text:p text:style-name="P25">UPOS <text:s text:c="6"/>| <text:s text:c="4"/>95.05 | <text:s text:c="4"/>95.05 | <text:s text:c="4"/>95.05 | <text:s text:c="4"/>95.05</text:p>
      <text:p text:style-name="P25">XPOS <text:s text:c="6"/>| <text:s text:c="4"/>49.72 | <text:s text:c="4"/>49.72 | <text:s text:c="4"/>49.72 | <text:s text:c="4"/>49.72</text:p>
      <text:p text:style-name="P25">UFeats <text:s text:c="4"/>| <text:s text:c="4"/>74.83 | <text:s text:c="4"/>74.83 | <text:s text:c="4"/>74.83 | <text:s text:c="4"/>74.83</text:p>
      <text:p text:style-name="P25">AllTags <text:s text:c="3"/>| <text:s text:c="4"/>48.73 | <text:s text:c="4"/>48.73 | <text:s text:c="4"/>48.73 | <text:s text:c="4"/>48.73</text:p>
      <text:p text:style-name="P25">Lemmas <text:s text:c="4"/>| <text:s text:c="4"/>93.17 | <text:s text:c="4"/>93.17 | <text:s text:c="4"/>93.17 | <text:s text:c="4"/>93.17</text:p>
      <text:p text:style-name="P46">To nahoře je pomocí modelu FicTree 2.17. To dole je pomocí mého modelu natrénovaného na Etalonu 13.</text:p>
      <text:p text:style-name="P47">Metric <text:s text:c="4"/>| Precision | <text:s text:c="3"/>Recall | <text:s/>F1 Score | AligndAcc</text:p>
      <text:p text:style-name="P47">-----------+-----------+-----------+-----------+-----------</text:p>
      <text:p text:style-name="P48">UPOS <text:s text:c="6"/>| <text:s text:c="4"/>95.08 | <text:s text:c="4"/>95.08 | <text:s text:c="4"/>95.08 | <text:s text:c="4"/>95.08</text:p>
      <text:p text:style-name="P48">XPOS <text:s text:c="6"/>| <text:s text:c="4"/>83.96 | <text:s text:c="4"/>83.96 | <text:s text:c="4"/>83.96 | <text:s text:c="4"/>83.96</text:p>
      <text:p text:style-name="P48">UFeats <text:s text:c="4"/>| <text:s text:c="4"/>83.07 | <text:s text:c="4"/>83.07 | <text:s text:c="4"/>83.07 | <text:s text:c="4"/>83.07</text:p>
      <text:p text:style-name="P48">AllTags <text:s text:c="3"/>| <text:s text:c="4"/>81.35 | <text:s text:c="4"/>81.35 | <text:s text:c="4"/>81.35 | <text:s text:c="4"/>81.35</text:p>
      <text:p text:style-name="P48">Lemmas <text:s text:c="4"/>| <text:s text:c="4"/>90.15 | <text:s text:c="4"/>90.15 | <text:s text:c="4"/>90.15 | <text:s text:c="4"/>90.15</text:p>
      <text:p text:style-name="P49"><text:span text:style-name="T20">Teď</text:span> pomocí mého modelu natrénovaného na Etalonu 1<text:span text:style-name="T20">6</text:span>.</text:p>
      <text:p text:style-name="P50">Metric <text:s text:c="4"/>| Precision | <text:s text:c="3"/>Recall | <text:s/>F1 Score | AligndAcc</text:p>
      <text:p text:style-name="P50">-----------+-----------+-----------+-----------+-----------</text:p>
      <text:p text:style-name="P42">UPOS <text:s text:c="6"/>| <text:s text:c="4"/>95.65 | <text:s text:c="4"/>95.65 | <text:s text:c="4"/>95.65 | <text:s text:c="4"/>95.65</text:p>
      <text:p text:style-name="P42">XPOS <text:s text:c="6"/>| <text:s text:c="4"/>87.22 | <text:s text:c="4"/>87.22 | <text:s text:c="4"/>87.22 | <text:s text:c="4"/>87.22</text:p>
      <text:p text:style-name="P42">UFeats <text:s text:c="4"/>| <text:s text:c="4"/>86.00 | <text:s text:c="4"/>86.00 | <text:s text:c="4"/>86.00 | <text:s text:c="4"/>86.00</text:p>
      <text:p text:style-name="P42">AllTags <text:s text:c="3"/>| <text:s text:c="4"/>84.73 | <text:s text:c="4"/>84.73 | <text:s text:c="4"/>84.73 | <text:s text:c="4"/>84.73</text:p>
      <text:p text:style-name="P42">Lemmas <text:s text:c="4"/>| <text:s text:c="4"/>93.95 | <text:s text:c="4"/>93.95 | <text:s text:c="4"/>93.95 | <text:s text:c="4"/>93.95</text:p>
      <text:p text:style-name="P51"><text:span text:style-name="T20">Teď</text:span><text:span text:style-name="T27"> pomocí mého modelu natrénovaného na Etalonu 1</text:span><text:span text:style-name="T21">9</text:span><text:span text:style-name="T27">.</text:span></text:p>
      <text:p text:style-name="P50">Metric <text:s text:c="4"/>| Precision | <text:s text:c="3"/>Recall | <text:s/>F1 Score | AligndAcc</text:p>
      <text:p text:style-name="P50">-----------+-----------+-----------+-----------+-----------</text:p>
      <text:p text:style-name="P52">UPOS <text:s text:c="6"/>| <text:s text:c="4"/>98.50 | <text:s text:c="4"/>98.50 | <text:s text:c="4"/>98.50 | <text:s text:c="4"/>98.50</text:p>
      <text:p text:style-name="P52">XPOS <text:s text:c="6"/>| <text:s text:c="4"/>95.73 | <text:s text:c="4"/>95.73 | <text:s text:c="4"/>95.73 | <text:s text:c="4"/>95.73</text:p>
      <text:p text:style-name="P52"><text:soft-page-break/>UFeats <text:s text:c="4"/>| <text:s text:c="4"/>95.65 | <text:s text:c="4"/>95.65 | <text:s text:c="4"/>95.65 | <text:s text:c="4"/>95.65</text:p>
      <text:p text:style-name="P52">AllTags <text:s text:c="3"/>| <text:s text:c="4"/>95.04 | <text:s text:c="4"/>95.04 | <text:s text:c="4"/>95.04 | <text:s text:c="4"/>95.04</text:p>
      <text:p text:style-name="P52">Lemmas <text:s text:c="4"/>| <text:s text:c="4"/>96.88 | <text:s text:c="4"/>96.88 | <text:s text:c="4"/>96.88 | <text:s text:c="4"/>96.88</text:p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5T23:13:58.079178300</dc:date>
    <dc:creator>Daniel Zeman</dc:creator>
    <meta:editing-duration>PT19H16M21S</meta:editing-duration>
    <meta:editing-cycles>30</meta:editing-cycles>
    <meta:generator>LibreOffice/25.2.7.2$Windows_X86_64 LibreOffice_project/5cbfd1ab6520636bb5f7b99185aa69bd7456825d</meta:generator>
    <meta:document-statistic meta:table-count="0" meta:image-count="0" meta:object-count="0" meta:page-count="6" meta:paragraph-count="144" meta:word-count="1595" meta:character-count="10901" meta:non-whitespace-character-count="7856"/>
  </office:meta>
</office:document-meta>
</file>