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0299" officeooo:paragraph-rsid="00110299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11d30d" officeooo:paragraph-rsid="0011d30d"/>
    </style:style>
    <style:style style:name="P6" style:family="paragraph" style:parent-style-name="Text_20_body" style:list-style-name="L1">
      <style:text-properties officeooo:rsid="001188d1" officeooo:paragraph-rsid="001188d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3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4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4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 Pro praktické nasazení budeme používat modely natrénované na celém etalonu.)</text:p>
          <text:list>
            <text:list-item>
              <text:p text:style-name="P5">Budu muset natrénovat i tokenizéry pomocí UDPipe 1. Jinak mi výsledný model nikdy správně neodtrhne částici <text:span text:style-name="T1">-ť</text:span><text:span text:style-name="T2">.</text:span></text:p>
            </text:list-item>
          </text:list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6">Všechny ostatní nápady, které jsme měli:</text:p>
          <text:list>
            <text:list-item>
              <text:p text:style-name="P6">Systematické vzájemné porovnání etalonů a jejich úprava, pak přetrénování všeho.</text:p>
            </text:list-item>
            <text:list-item>
              <text:p text:style-name="P6">Ruční syntaktická anotace (Bára, Lenka) a její zakomponování do modelů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4T21:03:27.396279700</dc:date>
    <dc:creator>Daniel Zeman</dc:creator>
    <meta:editing-duration>PT7H53M10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1" meta:word-count="296" meta:character-count="1959" meta:non-whitespace-character-count="1684"/>
  </office:meta>
</office:document-meta>
</file>