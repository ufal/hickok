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6150" officeooo:paragraph-rsid="00116150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341e35" officeooo:paragraph-rsid="00341e35"/>
    </style:style>
    <style:style style:name="P6" style:family="paragraph" style:parent-style-name="Text_20_body" style:list-style-name="L1">
      <style:text-properties officeooo:paragraph-rsid="0035ebe6"/>
    </style:style>
    <style:style style:name="P7" style:family="paragraph" style:parent-style-name="Text_20_body" style:list-style-name="L1">
      <style:text-properties officeooo:rsid="003700c3" officeooo:paragraph-rsid="003700c3"/>
    </style:style>
    <style:style style:name="P8" style:family="paragraph" style:parent-style-name="Text_20_body">
      <style:text-properties officeooo:rsid="003700c3"/>
    </style:style>
    <style:style style:name="P9" style:family="paragraph" style:parent-style-name="Standard">
      <style:text-properties officeooo:rsid="003700c3"/>
    </style:style>
    <style:style style:name="P10" style:family="paragraph" style:parent-style-name="Text_20_body" style:list-style-name="L1">
      <style:text-properties officeooo:rsid="00316b01" officeooo:paragraph-rsid="00316b01"/>
    </style:style>
    <style:style style:name="P11" style:family="paragraph" style:parent-style-name="Text_20_body" style:list-style-name="L1">
      <style:text-properties officeooo:rsid="001188d1" officeooo:paragraph-rsid="001188d1"/>
    </style:style>
    <style:style style:name="P12" style:family="paragraph" style:parent-style-name="Heading_20_1">
      <style:text-properties officeooo:rsid="00147183" officeooo:paragraph-rsid="00147183"/>
    </style:style>
    <style:style style:name="P13" style:family="paragraph" style:parent-style-name="Heading_20_2">
      <style:text-properties officeooo:rsid="00147183" officeooo:paragraph-rsid="00147183"/>
    </style:style>
    <style:style style:name="P14" style:family="paragraph" style:parent-style-name="Text_20_body">
      <style:text-properties officeooo:rsid="00147183" officeooo:paragraph-rsid="00147183"/>
    </style:style>
    <style:style style:name="P15" style:family="paragraph" style:parent-style-name="Text_20_body">
      <style:text-properties officeooo:rsid="001538a3" officeooo:paragraph-rsid="001538a3"/>
    </style:style>
    <style:style style:name="P16" style:family="paragraph" style:parent-style-name="Heading_20_3">
      <style:text-properties officeooo:rsid="00147183" officeooo:paragraph-rsid="00147183"/>
    </style:style>
    <style:style style:name="P17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8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9" style:family="paragraph" style:parent-style-name="Heading_20_3">
      <style:text-properties officeooo:rsid="00147183" officeooo:paragraph-rsid="0016e61e"/>
    </style:style>
    <style:style style:name="P20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21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22" style:family="paragraph" style:parent-style-name="Heading_20_3">
      <style:text-properties officeooo:paragraph-rsid="0016e61e"/>
    </style:style>
    <style:style style:name="P23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24" style:family="paragraph" style:parent-style-name="Heading_20_2">
      <style:text-properties officeooo:rsid="0017893d" officeooo:paragraph-rsid="0017893d"/>
    </style:style>
    <style:style style:name="P25" style:family="paragraph" style:parent-style-name="Text_20_body">
      <style:text-properties officeooo:rsid="0028a28b" officeooo:paragraph-rsid="0028a28b"/>
    </style:style>
    <style:style style:name="P26" style:family="paragraph" style:parent-style-name="Heading_20_3">
      <style:text-properties officeooo:rsid="0028a28b" officeooo:paragraph-rsid="0028a28b"/>
    </style:style>
    <style:style style:name="P27" style:family="paragraph" style:parent-style-name="Text_20_body">
      <style:text-properties officeooo:rsid="0017893d" officeooo:paragraph-rsid="0017893d"/>
    </style:style>
    <style:style style:name="P28" style:family="paragraph" style:parent-style-name="Text_20_body">
      <style:text-properties fo:language="cs" fo:country="CZ" officeooo:rsid="001d4ded" officeooo:paragraph-rsid="001d4ded"/>
    </style:style>
    <style:style style:name="P29" style:family="paragraph" style:parent-style-name="Text_20_body">
      <style:text-properties style:font-name="Liberation Mono" fo:font-size="10pt" officeooo:paragraph-rsid="00293f68" style:font-size-asian="10pt" style:font-size-complex="10pt"/>
    </style:style>
    <style:style style:name="P30" style:family="paragraph" style:parent-style-name="Text_20_body">
      <style:text-properties fo:color="#2a6099" loext:opacity="100%" style:font-name="Liberation Mono" fo:font-size="10pt" officeooo:paragraph-rsid="00293f68" style:font-size-asian="10pt" style:font-size-complex="10pt"/>
    </style:style>
    <style:style style:name="P31" style:family="paragraph" style:parent-style-name="Text_20_body">
      <style:text-properties officeooo:rsid="002b3eb0" officeooo:paragraph-rsid="002b3eb0"/>
    </style:style>
    <style:style style:name="P32" style:family="paragraph" style:parent-style-name="Text_20_body">
      <style:text-properties style:font-name="Liberation Mono" fo:font-size="10pt" officeooo:paragraph-rsid="002b3eb0" style:font-size-asian="10pt" style:font-size-complex="10pt"/>
    </style:style>
    <style:style style:name="P33" style:family="paragraph" style:parent-style-name="Text_20_body">
      <style:text-properties fo:color="#ff4000" loext:opacity="100%" style:font-name="Liberation Mono" fo:font-size="10pt" officeooo:paragraph-rsid="002b3eb0" style:font-size-asian="10pt" style:font-size-complex="10pt"/>
    </style:style>
    <style:style style:name="P34" style:family="paragraph" style:parent-style-name="Text_20_body">
      <style:text-properties officeooo:rsid="002b3eb0" officeooo:paragraph-rsid="002cf2e0"/>
    </style:style>
    <style:style style:name="P35" style:family="paragraph" style:parent-style-name="Text_20_body">
      <style:text-properties style:font-name="Liberation Mono" fo:font-size="10pt" officeooo:paragraph-rsid="002cf2e0" style:font-size-asian="10pt" style:font-size-complex="10pt"/>
    </style:style>
    <style:style style:name="P36" style:family="paragraph" style:parent-style-name="Text_20_body">
      <style:text-properties fo:color="#2a6099" loext:opacity="100%" style:font-name="Liberation Mono" fo:font-size="10pt" officeooo:paragraph-rsid="002cf2e0" style:font-size-asian="10pt" style:font-size-complex="10pt"/>
    </style:style>
    <style:style style:name="P37" style:family="paragraph" style:parent-style-name="Heading_20_3">
      <style:text-properties officeooo:rsid="0028a28b" officeooo:paragraph-rsid="002cf2e0"/>
    </style:style>
    <style:style style:name="P38" style:family="paragraph" style:parent-style-name="Text_20_body">
      <style:text-properties fo:language="cs" fo:country="CZ" officeooo:rsid="00202631" officeooo:paragraph-rsid="00202631"/>
    </style:style>
    <style:style style:name="P39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40" style:family="paragraph" style:parent-style-name="Text_20_body">
      <style:text-properties officeooo:rsid="002b3eb0" officeooo:paragraph-rsid="002c444a"/>
    </style:style>
    <style:style style:name="P41" style:family="paragraph" style:parent-style-name="Text_20_body">
      <style:text-properties style:font-name="Liberation Mono" fo:font-size="10pt" officeooo:paragraph-rsid="002c444a" style:font-size-asian="10pt" style:font-size-complex="10pt"/>
    </style:style>
    <style:style style:name="P42" style:family="paragraph" style:parent-style-name="Text_20_body">
      <style:text-properties fo:color="#2a6099" loext:opacity="100%" style:font-name="Liberation Mono" fo:font-size="10pt" officeooo:paragraph-rsid="002c444a" style:font-size-asian="10pt" style:font-size-complex="10pt"/>
    </style:style>
    <style:style style:name="P43" style:family="paragraph" style:parent-style-name="Text_20_body">
      <style:text-properties officeooo:rsid="002b3eb0" officeooo:paragraph-rsid="002eaad6"/>
    </style:style>
    <style:style style:name="P44" style:family="paragraph" style:parent-style-name="Text_20_body">
      <style:text-properties style:font-name="Liberation Mono" fo:font-size="10pt" officeooo:paragraph-rsid="002eaad6" style:font-size-asian="10pt" style:font-size-complex="10pt"/>
    </style:style>
    <style:style style:name="P45" style:family="paragraph" style:parent-style-name="Text_20_body">
      <style:text-properties fo:color="#ff4000" loext:opacity="100%" style:font-name="Liberation Mono" fo:font-size="10pt" officeooo:paragraph-rsid="002eaad6" style:font-size-asian="10pt" style:font-size-complex="10pt"/>
    </style:style>
    <style:style style:name="P46" style:family="paragraph" style:parent-style-name="Text_20_body">
      <style:text-properties officeooo:paragraph-rsid="002eaad6"/>
    </style:style>
    <style:style style:name="P47" style:family="paragraph" style:parent-style-name="Text_20_body">
      <style:text-properties fo:color="#2a6099" loext:opacity="100%" style:font-name="Liberation Mono" fo:font-size="10pt" officeooo:paragraph-rsid="002f71d8" style:font-size-asian="10pt" style:font-size-complex="10pt"/>
    </style:style>
    <style:style style:name="P48" style:family="paragraph" style:parent-style-name="Heading_20_3">
      <style:text-properties officeooo:rsid="0028a28b" officeooo:paragraph-rsid="002eaad6"/>
    </style:style>
    <style:style style:name="P49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50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51" style:family="paragraph" style:parent-style-name="Text_20_body">
      <style:text-properties officeooo:rsid="002b3eb0" officeooo:paragraph-rsid="002ca51d"/>
    </style:style>
    <style:style style:name="P52" style:family="paragraph" style:parent-style-name="Text_20_body">
      <style:text-properties style:font-name="Liberation Mono" fo:font-size="10pt" officeooo:paragraph-rsid="002ca51d" style:font-size-asian="10pt" style:font-size-complex="10pt"/>
    </style:style>
    <style:style style:name="P53" style:family="paragraph" style:parent-style-name="Text_20_body">
      <style:text-properties fo:color="#2a6099" loext:opacity="100%" style:font-name="Liberation Mono" fo:font-size="10pt" officeooo:paragraph-rsid="002ca51d" style:font-size-asian="10pt" style:font-size-complex="10pt"/>
    </style:style>
    <style:style style:name="P54" style:family="paragraph" style:parent-style-name="Text_20_body">
      <style:text-properties officeooo:rsid="002b3eb0" officeooo:paragraph-rsid="002f71d8"/>
    </style:style>
    <style:style style:name="P55" style:family="paragraph" style:parent-style-name="Text_20_body">
      <style:text-properties style:font-name="Liberation Mono" fo:font-size="10pt" officeooo:paragraph-rsid="002f71d8" style:font-size-asian="10pt" style:font-size-complex="10pt"/>
    </style:style>
    <style:style style:name="P56" style:family="paragraph" style:parent-style-name="Text_20_body">
      <style:text-properties officeooo:paragraph-rsid="002f71d8"/>
    </style:style>
    <style:style style:name="P57" style:family="paragraph" style:parent-style-name="Text_20_body">
      <style:text-properties fo:color="#ff4000" loext:opacity="100%" style:font-name="Liberation Mono" fo:font-size="10pt" officeooo:paragraph-rsid="002f71d8" style:font-size-asian="10pt" style:font-size-complex="10pt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officeooo:rsid="0035ebe6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color="#0080ff" loext:opacity="100%"/>
    </style:style>
    <style:style style:name="T7" style:family="text">
      <style:text-properties fo:color="#0080ff" loext:opacity="100%" fo:font-style="italic"/>
    </style:style>
    <style:style style:name="T8" style:family="text">
      <style:text-properties fo:font-family="monospace"/>
    </style:style>
    <style:style style:name="T9" style:family="text">
      <style:text-properties officeooo:rsid="00341e35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6e61e"/>
    </style:style>
    <style:style style:name="T12" style:family="text">
      <style:text-properties officeooo:rsid="00147183"/>
    </style:style>
    <style:style style:name="T13" style:family="text">
      <style:text-properties officeooo:rsid="0028a28b"/>
    </style:style>
    <style:style style:name="T14" style:family="text">
      <style:text-properties fo:font-weight="bold" officeooo:rsid="0028a28b" style:font-weight-asian="bold" style:font-weight-complex="bold"/>
    </style:style>
    <style:style style:name="T15" style:family="text">
      <style:text-properties fo:font-weight="bold" officeooo:rsid="0024c0c2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7988f"/>
    </style:style>
    <style:style style:name="T18" style:family="text">
      <style:text-properties officeooo:rsid="0017b6e9"/>
    </style:style>
    <style:style style:name="T19" style:family="text">
      <style:text-properties fo:language="en" fo:country="US" officeooo:rsid="0019bf0d"/>
    </style:style>
    <style:style style:name="T20" style:family="text">
      <style:text-properties fo:language="cs" fo:country="CZ" officeooo:rsid="0019bf0d"/>
    </style:style>
    <style:style style:name="T21" style:family="text">
      <style:text-properties fo:language="cs" fo:country="CZ" officeooo:rsid="0028a28b"/>
    </style:style>
    <style:style style:name="T22" style:family="text">
      <style:text-properties officeooo:rsid="001f4922"/>
    </style:style>
    <style:style style:name="T23" style:family="text">
      <style:text-properties officeooo:rsid="002cf2e0"/>
    </style:style>
    <style:style style:name="T24" style:family="text">
      <style:text-properties officeooo:rsid="002eaad6"/>
    </style:style>
    <style:style style:name="T25" style:family="text">
      <style:text-properties fo:font-weight="bold" officeooo:rsid="00262299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1aee3" style:font-weight-asian="normal" style:font-weight-complex="normal"/>
    </style:style>
    <style:style style:name="T28" style:family="text">
      <style:text-properties officeooo:rsid="00262299"/>
    </style:style>
    <style:style style:name="T29" style:family="text">
      <style:text-properties fo:font-weight="normal" officeooo:rsid="002273f2" style:font-weight-asian="normal" style:font-weight-complex="normal"/>
    </style:style>
    <style:style style:name="T30" style:family="text">
      <style:text-properties officeooo:rsid="002b3eb0"/>
    </style:style>
    <style:style style:name="T31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2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3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<text:span text:style-name="T1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</text:span> Pro praktické nasazení budeme používat modely natrénované na celém etalonu. <text:span text:style-name="T2">Ale budu se muset zeptat Milana, jestli např. můžu při trénování dodat jen trénovací a žádná vývojová data.</text:span>)</text:p>
        </text:list-item>
        <text:list-item>
          <text:p text:style-name="P5">Zpracovat upravenou verzi Etalonu 19, kde Martin a Klára ručně opravili segmentaci na věty. <text:span text:style-name="T3">Moje konverze navíc bude vyžadovat úpravy:</text:span></text:p>
          <text:list>
            <text:list-item>
              <text:p text:style-name="P6"><text:span text:style-name="T3">10. listopadu 2025 jsem Martinovi psal: „</text:span>Díky za ten seznam s "Yo", zatím jsem na něj jen velmi rychle koukl a přišel mi OK. Já si ho nějak zakomponuju do konverzní procedury, kdyby se mi na něm přece jen něco nezdálo, tak se ozvu.“</text:p>
            </text:list-item>
            <text:list-item>
              <text:p text:style-name="P7">8. prosince (ale je to znova poslaný mail z 11.11.) je ještě tohle: Dan: S tím pasívem bez rodu nevím. Jestli je to analytický tvar, by podle mě nemělo hrát roli, protože primárně nám jde o rysy toho příčestí. Já myslel, že pasivní infinitiv znám z nové češtiny (být viděn/viděna/viděno), tam ovšem o jmenném rodu není pochyb. S touhle jakoby akuzativní koncovkou to neznám a musím říct, že když teď koukám na příslušné věty přímo v datech, tak jim nerozumím. (1: <text:span text:style-name="T4">Harfeník aneb Naděje </text:span><text:span text:style-name="T5">zahanbenu</text:span><text:span text:style-name="T4"> býti nedopustí.</text:span> 2: <text:span text:style-name="T4">Neb v tom případu postaví se nepochybně každá mocnost na to místo, na které povolanou býti se domnívá a k němuž přirozeným během věcí </text:span><text:span text:style-name="T5">puzenu</text:span><text:span text:style-name="T4"> se cítí.</text:span>) V tom druhém případě mi skoro připadá, že tam místo "puzenu" mělo být "puzenou", stejně jako o pár slov dřív je "povolanou", a mělo to být adjektivum ženského rodu, singulár, instrumentál – možná je to jen překlep?</text:p>
            </text:list-item>
          </text:list>
        </text:list-item>
      </text:list>
      <text:p text:style-name="P8"><text:span text:style-name="T6">Určitě se tahle kategorie pasivního infinitivu vyskytne v těch staročeských a středněčeských etalonech, Klidně ty dva případy od nás, o kterých si píšeme, uprav podle toho. Abych ti trochu vysvvětlil tu kategorii: tohle bylo trochu speciální oproti novočeskému "být viděn" etc., tohle vlastně není infinitiv ale trpné přičestí. Infinit trpný je tvořen původně jmenným tvarem "adjektiva" </text:span><text:soft-page-break/><text:span text:style-name="T6">v dativu singuláru a tvarem být, proto u toho máme slovesnou interpretaci v tagu a bez určení jmenného rodu. V tom případě s "puzenu" jste s Klárou stejného názoru, že by to mělo být adjektivum v Isg. Za mě je pořád korektní to vykládat jako  pasivní infinitiv, jehož součástí je tvar </text:span><text:span text:style-name="T7">býti , </text:span><text:span text:style-name="T6">který ve větě předchází, ale chápu tvou a Klářinu interpretaci. Jelikož jste dva, tak to "puzenu" v etalonu předělám na "puzenou". Souhlasíš? Případ "zahanbenu" upravím podle toho, jak jste to anotovali ve staročeském etalonu (až na to narazíš, pošli mi prosím vaše řešení). Dík. </text:span> </text:p>
      <text:p text:style-name="P9">Vše, až na jeden případ, jsme opravili, ponechali jsme pouze případ:  <text:span text:style-name="T8">1811_wachter_prekl_harfenik.conllu:4    zahanbenu       zahanbit        VERB    Vs-S------AP---P        Aspect=Perf|Number=Sing|Polarity=Pos|VerbForm=Part|Voice=Pass   _       _       _       _</text:span></text:p>
      <text:p text:style-name="Standard">bez vyplněného jmenného rodu s tím, že se jedná o pasivní infinitiv a nalož s ním (tagem) stejně jako se staročeskými tvary stejné kategorie (viz můj mail z 11.11., kde se taky zmiňoval návrh na řešení tokenů s tagem Yo - ty tudíž jsou zatím v etalonu nezměněny mají pořád tag Yo ).</text:p>
      <text:p text:style-name="P8"/>
      <text:list text:continue-numbering="true" text:style-name="L1">
        <text:list-item>
          <text:p text:style-name="P10">Označkovat monitorovací korpus etalonovými modely. <text:span text:style-name="T9">(Tento krok bude třeba opakovat pokaždé, když vylepšíme anotaci etalonů a přetrénujeme modely.)</text:span></text:p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11">Všechny ostatní nápady, které jsme měli:</text:p>
          <text:list>
            <text:list-item>
              <text:p text:style-name="P11">Systematické vzájemné porovnání etalonů a jejich úprava, pak přetrénování všeho.</text:p>
            </text:list-item>
            <text:list-item>
              <text:p text:style-name="P11">Ruční syntaktická anotace (Bára, Lenka) a její zakomponování do modelů.</text:p>
            </text:list-item>
          </text:list>
        </text:list-item>
      </text:list>
      <text:h text:style-name="P12" text:outline-level="1">Vyhodnocení UDPipe na etalonech</text:h>
      <text:h text:style-name="P13" text:outline-level="2">Pouze test</text:h>
      <text:p text:style-name="P14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5">Následující hodnoty byly naměřeny <text:span text:style-name="T10">5.6.2026</text:span> na takovém tvaru etalonů, který v tu chvíli existoval. Později se ještě budou etalony upravovat, takže tato čísla vyjdou jinak.</text:p>
      <text:h text:style-name="P16" text:outline-level="3">Etalon 13</text:h>
      <text:p text:style-name="P17">Metric <text:s text:c="4"/>| Precision | <text:s text:c="3"/>Recall | <text:s/>F1 Score | AligndAcc</text:p>
      <text:p text:style-name="P17">-----------+-----------+-----------+-----------+-----------</text:p>
      <text:p text:style-name="P18">UPOS <text:s text:c="6"/>| <text:s text:c="4"/>92.04 | <text:s text:c="4"/>92.04 | <text:s text:c="4"/>92.04 | <text:s text:c="4"/>92.04</text:p>
      <text:p text:style-name="P18">XPOS <text:s text:c="6"/>| <text:s text:c="4"/>43.58 | <text:s text:c="4"/>43.58 | <text:s text:c="4"/>43.58 | <text:s text:c="4"/>43.58</text:p>
      <text:p text:style-name="P18">UFeats <text:s text:c="4"/>| <text:s text:c="4"/>65.29 | <text:s text:c="4"/>65.29 | <text:s text:c="4"/>65.29 | <text:s text:c="4"/>65.29</text:p>
      <text:p text:style-name="P18">AllTags <text:s text:c="3"/>| <text:s text:c="4"/>42.76 | <text:s text:c="4"/>42.76 | <text:s text:c="4"/>42.76 | <text:s text:c="4"/>42.76</text:p>
      <text:p text:style-name="P18">Lemmas <text:s text:c="4"/>| <text:s text:c="4"/>78.55 | <text:s text:c="4"/>78.55 | <text:s text:c="4"/>78.55 | <text:s text:c="4"/>78.55</text:p>
      <text:h text:style-name="P19" text:outline-level="3"><text:soft-page-break/>Etalon 1<text:span text:style-name="T11">6</text:span></text:h>
      <text:p text:style-name="P20">Metric <text:s text:c="4"/>| Precision | <text:s text:c="3"/>Recall | <text:s/>F1 Score | AligndAcc</text:p>
      <text:p text:style-name="P20">-----------+-----------+-----------+-----------+-----------</text:p>
      <text:p text:style-name="P21">UPOS <text:s text:c="6"/>| <text:s text:c="4"/>96.27 | <text:s text:c="4"/>96.27 | <text:s text:c="4"/>96.27 | <text:s text:c="4"/>96.27</text:p>
      <text:p text:style-name="P21">XPOS <text:s text:c="6"/>| <text:s text:c="4"/>48.61 | <text:s text:c="4"/>48.61 | <text:s text:c="4"/>48.61 | <text:s text:c="4"/>48.61</text:p>
      <text:p text:style-name="P21">UFeats <text:s text:c="4"/>| <text:s text:c="4"/>71.92 | <text:s text:c="4"/>71.92 | <text:s text:c="4"/>71.92 | <text:s text:c="4"/>71.92</text:p>
      <text:p text:style-name="P21">AllTags <text:s text:c="3"/>| <text:s text:c="4"/>47.51 | <text:s text:c="4"/>47.51 | <text:s text:c="4"/>47.51 | <text:s text:c="4"/>47.51</text:p>
      <text:p text:style-name="P21">Lemmas <text:s text:c="4"/>| <text:s text:c="4"/>90.25 | <text:s text:c="4"/>90.25 | <text:s text:c="4"/>90.25 | <text:s text:c="4"/>90.25</text:p>
      <text:h text:style-name="P22" text:outline-level="3"><text:span text:style-name="T12">Etalon 1</text:span><text:span text:style-name="T11">9</text:span></text:h>
      <text:p text:style-name="P20">Metric <text:s text:c="4"/>| Precision | <text:s text:c="3"/>Recall | <text:s/>F1 Score | AligndAcc</text:p>
      <text:p text:style-name="P20">-----------+-----------+-----------+-----------+-----------</text:p>
      <text:p text:style-name="P23">UPOS <text:s text:c="6"/>| <text:s text:c="4"/>95.10 | <text:s text:c="4"/>95.10 | <text:s text:c="4"/>95.10 | <text:s text:c="4"/>95.10</text:p>
      <text:p text:style-name="P23">XPOS <text:s text:c="6"/>| <text:s text:c="4"/>49.98 | <text:s text:c="4"/>49.98 | <text:s text:c="4"/>49.98 | <text:s text:c="4"/>49.98</text:p>
      <text:p text:style-name="P23">UFeats <text:s text:c="4"/>| <text:s text:c="4"/>76.81 | <text:s text:c="4"/>76.81 | <text:s text:c="4"/>76.81 | <text:s text:c="4"/>76.81</text:p>
      <text:p text:style-name="P23">AllTags <text:s text:c="3"/>| <text:s text:c="4"/>49.11 | <text:s text:c="4"/>49.11 | <text:s text:c="4"/>49.11 | <text:s text:c="4"/>49.11</text:p>
      <text:p text:style-name="P23">Lemmas <text:s text:c="4"/>| <text:s text:c="4"/>93.42 | <text:s text:c="4"/>93.42 | <text:s text:c="4"/>93.42 | <text:s text:c="4"/>93.42</text:p>
      <text:h text:style-name="P24" text:outline-level="2">Kandidáti na <text:span text:style-name="T13">dev a </text:span>test</text:h>
      <text:p text:style-name="P25">Pro trénování modelu je možná nezbytné mít dev data (i kdyby UDPipe přežil, že mu je nedám, stejně by si je asi musel vytvořit z části trénovacích dat) a na vyhodnocení nových modelů samozřejmě potřebuju i testovací data. Beru celé dokumenty, snažím se o průřez celým časovým obdobím daného etalonu i o trochu různé žánry. V budoucnosti se výběr může změnit třeba i s ohledem na to, které soubory budou mít ruční syntaktickou anotaci, ale zatím (5.6.2026) dělám pokusy s následujícím dělením:</text:p>
      <text:h text:style-name="P26" text:outline-level="3">Etalon 13</text:h>
      <text:p text:style-name="P27"><text:span text:style-name="T14">D</text:span><text:span text:style-name="T15">ev</text:span><text:span text:style-name="T16">:</text:span> 005_umuc_rajhr (veršovaný, 1350), <text:span text:style-name="T17">017_pas_muz_a (druhá půlka 14. stol., život svatého Mauricia)., </text:span><text:span text:style-name="T18">030_lek_frant_muz (lékařský spis, 1444), </text:span><text:span text:style-name="T19">040_let_a </text:span><text:span text:style-name="T20">(letopisy, 1475) … </text:span><text:span text:style-name="T21">9558 slov.</text:span></text:p>
      <text:p text:style-name="P28"><text:span text:style-name="T14">T</text:span><text:span text:style-name="T15">est</text:span><text:span text:style-name="T16">:</text:span> 010_bibl_drazd_mt (<text:span text:style-name="T22">1365, </text:span>část Matoušova evangelia v Bibli drážďanské), <text:span text:style-name="T22">019_rada_otc_r (konec 14. století, rada otce synovi), 033_prav_svab_c (1448, právní sborník)</text:span>, 042_pov_ol (druhá půlka 15. stol., Olomoucké povídky) … <text:span text:style-name="T13">9358 slov.</text:span></text:p>
      <text:p text:style-name="P29">Metric <text:s text:c="4"/>| Precision | <text:s text:c="3"/>Recall | <text:s/>F1 Score | AligndAcc</text:p>
      <text:p text:style-name="P29">-----------+-----------+-----------+-----------+-----------</text:p>
      <text:p text:style-name="P30">UPOS <text:s text:c="6"/>| <text:s text:c="4"/>92.64 | <text:s text:c="4"/>92.64 | <text:s text:c="4"/>92.64 | <text:s text:c="4"/>92.64</text:p>
      <text:p text:style-name="P30">XPOS <text:s text:c="6"/>| <text:s text:c="4"/>43.16 | <text:s text:c="4"/>43.16 | <text:s text:c="4"/>43.16 | <text:s text:c="4"/>43.16</text:p>
      <text:p text:style-name="P30">UFeats <text:s text:c="4"/>| <text:s text:c="4"/>65.77 | <text:s text:c="4"/>65.77 | <text:s text:c="4"/>65.77 | <text:s text:c="4"/>65.77</text:p>
      <text:p text:style-name="P30">AllTags <text:s text:c="3"/>| <text:s text:c="4"/>42.19 | <text:s text:c="4"/>42.19 | <text:s text:c="4"/>42.19 | <text:s text:c="4"/>42.19</text:p>
      <text:p text:style-name="P30">Lemmas <text:s text:c="4"/>| <text:s text:c="4"/>78.19 | <text:s text:c="4"/>78.19 | <text:s text:c="4"/>78.19 | <text:s text:c="4"/>78.19</text:p>
      <text:p text:style-name="P31"><text:soft-page-break/>To nahoře je pomocí modelu FicTree 2.17. To dole je pomocí mého modelu natrénovaného na Etalonu 13.</text:p>
      <text:p text:style-name="P32">Metric <text:s text:c="4"/>| Precision | <text:s text:c="3"/>Recall | <text:s/>F1 Score | AligndAcc</text:p>
      <text:p text:style-name="P32">-----------+-----------+-----------+-----------+-----------</text:p>
      <text:p text:style-name="P33">UPOS <text:s text:c="6"/>| <text:s text:c="4"/>97.87 | <text:s text:c="4"/>97.87 | <text:s text:c="4"/>97.87 | <text:s text:c="4"/>97.87</text:p>
      <text:p text:style-name="P33">XPOS <text:s text:c="6"/>| <text:s text:c="4"/>92.73 | <text:s text:c="4"/>92.73 | <text:s text:c="4"/>92.73 | <text:s text:c="4"/>92.73</text:p>
      <text:p text:style-name="P33">UFeats <text:s text:c="4"/>| <text:s text:c="4"/>92.72 | <text:s text:c="4"/>92.72 | <text:s text:c="4"/>92.72 | <text:s text:c="4"/>92.72</text:p>
      <text:p text:style-name="P33">AllTags <text:s text:c="3"/>| <text:s text:c="4"/>91.91 | <text:s text:c="4"/>91.91 | <text:s text:c="4"/>91.91 | <text:s text:c="4"/>91.91</text:p>
      <text:p text:style-name="P33">Lemmas <text:s text:c="4"/>| <text:s text:c="4"/>95.47 | <text:s text:c="4"/>95.47 | <text:s text:c="4"/>95.47 | <text:s text:c="4"/>95.47</text:p>
      <text:p text:style-name="P34"><text:span text:style-name="T23">Teď</text:span> pomocí mého modelu natrénovaného na Etalonu 1<text:span text:style-name="T23">6</text:span>.</text:p>
      <text:p text:style-name="P35">Metric <text:s text:c="4"/>| Precision | <text:s text:c="3"/>Recall | <text:s/>F1 Score | AligndAcc</text:p>
      <text:p text:style-name="P35">-----------+-----------+-----------+-----------+-----------</text:p>
      <text:p text:style-name="P36">UPOS <text:s text:c="6"/>| <text:s text:c="4"/>95.58 | <text:s text:c="4"/>95.58 | <text:s text:c="4"/>95.58 | <text:s text:c="4"/>95.58</text:p>
      <text:p text:style-name="P36">XPOS <text:s text:c="6"/>| <text:s text:c="4"/>86.47 | <text:s text:c="4"/>86.47 | <text:s text:c="4"/>86.47 | <text:s text:c="4"/>86.47</text:p>
      <text:p text:style-name="P36">UFeats <text:s text:c="4"/>| <text:s text:c="4"/>86.75 | <text:s text:c="4"/>86.75 | <text:s text:c="4"/>86.75 | <text:s text:c="4"/>86.75</text:p>
      <text:p text:style-name="P36">AllTags <text:s text:c="3"/>| <text:s text:c="4"/>85.50 | <text:s text:c="4"/>85.50 | <text:s text:c="4"/>85.50 | <text:s text:c="4"/>85.50</text:p>
      <text:p text:style-name="P36">Lemmas <text:s text:c="4"/>| <text:s text:c="4"/>86.89 | <text:s text:c="4"/>86.89 | <text:s text:c="4"/>86.89 | <text:s text:c="4"/>86.89</text:p>
      <text:p text:style-name="P34"><text:span text:style-name="T23">Teď</text:span> pomocí mého modelu natrénovaného na Etalonu 1<text:span text:style-name="T24">9</text:span>.</text:p>
      <text:p text:style-name="P35">Metric <text:s text:c="4"/>| Precision | <text:s text:c="3"/>Recall | <text:s/>F1 Score | AligndAcc</text:p>
      <text:p text:style-name="P35">-----------+-----------+-----------+-----------+-----------</text:p>
      <text:p text:style-name="P36">UPOS <text:s text:c="6"/>| <text:s text:c="4"/>93.43 | <text:s text:c="4"/>93.43 | <text:s text:c="4"/>93.43 | <text:s text:c="4"/>93.43</text:p>
      <text:p text:style-name="P36">XPOS <text:s text:c="6"/>| <text:s text:c="4"/>77.37 | <text:s text:c="4"/>77.37 | <text:s text:c="4"/>77.37 | <text:s text:c="4"/>77.37</text:p>
      <text:p text:style-name="P36">UFeats <text:s text:c="4"/>| <text:s text:c="4"/>77.87 | <text:s text:c="4"/>77.87 | <text:s text:c="4"/>77.87 | <text:s text:c="4"/>77.87</text:p>
      <text:p text:style-name="P36">AllTags <text:s text:c="3"/>| <text:s text:c="4"/>75.81 | <text:s text:c="4"/>75.81 | <text:s text:c="4"/>75.81 | <text:s text:c="4"/>75.81</text:p>
      <text:p text:style-name="P36">Lemmas <text:s text:c="4"/>| <text:s text:c="4"/>80.03 | <text:s text:c="4"/>80.03 | <text:s text:c="4"/>80.03 | <text:s text:c="4"/>80.03</text:p>
      <text:h text:style-name="P37" text:outline-level="3">Etalon 16</text:h>
      <text:p text:style-name="P38"><text:span text:style-name="T14">D</text:span><text:span text:style-name="T25">ev</text:span><text:span text:style-name="T16">:</text:span><text:span text:style-name="T26"> </text:span><text:span text:style-name="T27">049_frantovy_prava (1518), 065_o_ctnych_manzelkach_tehotnych (1615), 076_smol_jimr (soudní zápis, 1726) … 9691 slov.</text:span></text:p>
      <text:p text:style-name="P39"><text:span text:style-name="T13">T</text:span><text:span text:style-name="T28">est</text:span>:<text:span text:style-name="T26"> 050_hanus (1538), </text:span><text:span text:style-name="T29">063_div_velik (1612), 080_pranostika_nova (1766) … 9556 slov.</text:span></text:p>
      <text:p text:style-name="P29">Metric <text:s text:c="4"/>| Precision | <text:s text:c="3"/>Recall | <text:s/>F1 Score | AligndAcc</text:p>
      <text:p text:style-name="P29">-----------+-----------+-----------+-----------+-----------</text:p>
      <text:p text:style-name="P30">UPOS <text:s text:c="6"/>| <text:s text:c="4"/>96.66 | <text:s text:c="4"/>96.66 | <text:s text:c="4"/>96.66 | <text:s text:c="4"/>96.66</text:p>
      <text:p text:style-name="P30">XPOS <text:s text:c="6"/>| <text:s text:c="4"/>50.63 | <text:s text:c="4"/>50.63 | <text:s text:c="4"/>50.63 | <text:s text:c="4"/>50.63</text:p>
      <text:p text:style-name="P30">UFeats <text:s text:c="4"/>| <text:s text:c="4"/>72.71 | <text:s text:c="4"/>72.71 | <text:s text:c="4"/>72.71 | <text:s text:c="4"/>72.71</text:p>
      <text:p text:style-name="P30">AllTags <text:s text:c="3"/>| <text:s text:c="4"/>49.35 | <text:s text:c="4"/>49.35 | <text:s text:c="4"/>49.35 | <text:s text:c="4"/>49.35</text:p>
      <text:p text:style-name="P30">Lemmas <text:s text:c="4"/>| <text:s text:c="4"/>91.72 | <text:s text:c="4"/>91.72 | <text:s text:c="4"/>91.72 | <text:s text:c="4"/>91.72</text:p>
      <text:p text:style-name="P40"><text:soft-page-break/>To nahoře je pomocí modelu FicTree 2.17. To dole je pomocí mého modelu natrénovaného na Etalonu 13.</text:p>
      <text:p text:style-name="P41">Metric <text:s text:c="4"/>| Precision | <text:s text:c="3"/>Recall | <text:s/>F1 Score | AligndAcc</text:p>
      <text:p text:style-name="P41">-----------+-----------+-----------+-----------+-----------</text:p>
      <text:p text:style-name="P42">UPOS <text:s text:c="6"/>| <text:s text:c="4"/>97.98 | <text:s text:c="4"/>97.98 | <text:s text:c="4"/>97.98 | <text:s text:c="4"/>97.98</text:p>
      <text:p text:style-name="P42">XPOS <text:s text:c="6"/>| <text:s text:c="4"/>89.88 | <text:s text:c="4"/>89.88 | <text:s text:c="4"/>89.88 | <text:s text:c="4"/>89.88</text:p>
      <text:p text:style-name="P42">UFeats <text:s text:c="4"/>| <text:s text:c="4"/>90.00 | <text:s text:c="4"/>90.00 | <text:s text:c="4"/>90.00 | <text:s text:c="4"/>90.00</text:p>
      <text:p text:style-name="P42">AllTags <text:s text:c="3"/>| <text:s text:c="4"/>88.92 | <text:s text:c="4"/>88.92 | <text:s text:c="4"/>88.92 | <text:s text:c="4"/>88.92</text:p>
      <text:p text:style-name="P42">Lemmas <text:s text:c="4"/>| <text:s text:c="4"/>91.86 | <text:s text:c="4"/>91.86 | <text:s text:c="4"/>91.86 | <text:s text:c="4"/>91.86</text:p>
      <text:p text:style-name="P43"><text:span text:style-name="T23">Teď</text:span> pomocí mého modelu natrénovaného na Etalonu 1<text:span text:style-name="T23">6</text:span>.</text:p>
      <text:p text:style-name="P44">Metric <text:s text:c="4"/>| Precision | <text:s text:c="3"/>Recall | <text:s/>F1 Score | AligndAcc</text:p>
      <text:p text:style-name="P44">-----------+-----------+-----------+-----------+-----------</text:p>
      <text:p text:style-name="P45">UPOS <text:s text:c="6"/>| <text:s text:c="4"/>98.67 | <text:s text:c="4"/>98.67 | <text:s text:c="4"/>98.67 | <text:s text:c="4"/>98.67</text:p>
      <text:p text:style-name="P45">XPOS <text:s text:c="6"/>| <text:s text:c="4"/>93.79 | <text:s text:c="4"/>93.79 | <text:s text:c="4"/>93.79 | <text:s text:c="4"/>93.79</text:p>
      <text:p text:style-name="P45">UFeats <text:s text:c="4"/>| <text:s text:c="4"/>93.78 | <text:s text:c="4"/>93.78 | <text:s text:c="4"/>93.78 | <text:s text:c="4"/>93.78</text:p>
      <text:p text:style-name="P45">AllTags <text:s text:c="3"/>| <text:s text:c="4"/>92.96 | <text:s text:c="4"/>92.96 | <text:s text:c="4"/>92.96 | <text:s text:c="4"/>92.96</text:p>
      <text:p text:style-name="P45">Lemmas <text:s text:c="4"/>| <text:s text:c="4"/>95.37 | <text:s text:c="4"/>95.37 | <text:s text:c="4"/>95.37 | <text:s text:c="4"/>95.37</text:p>
      <text:p text:style-name="P46"><text:span text:style-name="T23">Teď</text:span><text:span text:style-name="T30"> pomocí mého modelu natrénovaného na Etalonu 1</text:span><text:span text:style-name="T24">9</text:span><text:span text:style-name="T30">.</text:span></text:p>
      <text:p text:style-name="P44">Metric <text:s text:c="4"/>| Precision | <text:s text:c="3"/>Recall | <text:s/>F1 Score | AligndAcc</text:p>
      <text:p text:style-name="P44">-----------+-----------+-----------+-----------+-----------</text:p>
      <text:p text:style-name="P47">UPOS <text:s text:c="6"/>| <text:s text:c="4"/>97.21 | <text:s text:c="4"/>97.21 | <text:s text:c="4"/>97.21 | <text:s text:c="4"/>97.21</text:p>
      <text:p text:style-name="P47">XPOS <text:s text:c="6"/>| <text:s text:c="4"/>85.48 | <text:s text:c="4"/>85.48 | <text:s text:c="4"/>85.48 | <text:s text:c="4"/>85.48</text:p>
      <text:p text:style-name="P47">UFeats <text:s text:c="4"/>| <text:s text:c="4"/>84.22 | <text:s text:c="4"/>84.22 | <text:s text:c="4"/>84.22 | <text:s text:c="4"/>84.22</text:p>
      <text:p text:style-name="P47">AllTags <text:s text:c="3"/>| <text:s text:c="4"/>83.25 | <text:s text:c="4"/>83.25 | <text:s text:c="4"/>83.25 | <text:s text:c="4"/>83.25</text:p>
      <text:p text:style-name="P47">Lemmas <text:s text:c="4"/>| <text:s text:c="4"/>92.65 | <text:s text:c="4"/>92.65 | <text:s text:c="4"/>92.65 | <text:s text:c="4"/>92.65</text:p>
      <text:h text:style-name="P48" text:outline-level="3">Etalon 19</text:h>
      <text:p text:style-name="P49"><text:span text:style-name="T13">D</text:span><text:span text:style-name="T28">ev</text:span>:<text:span text:style-name="T26"> 1802_krameriusovy_noviny_21.8.1802, 1832_svihlik_edmund_a_belinka, 1855_stroupeznicka_boure, </text:span><text:span text:style-name="T31">1869_jaros_z_chladku … 8897 slov.</text:span></text:p>
      <text:p text:style-name="P50"><text:span text:style-name="T13">T</text:span>est:<text:span text:style-name="T26"> 1808_kramerius_vyd_rozlicne_povidacky, 1827_rettigova_bila_ruze, 1846_prazske_noviny_19.3.1846, 1874_palacky_nejnovejsi_politicke_uvahy … 8891 slov.</text:span></text:p>
      <text:p text:style-name="P29">Metric <text:s text:c="4"/>| Precision | <text:s text:c="3"/>Recall | <text:s/>F1 Score | AligndAcc</text:p>
      <text:p text:style-name="P29">-----------+-----------+-----------+-----------+-----------</text:p>
      <text:p text:style-name="P30">UPOS <text:s text:c="6"/>| <text:s text:c="4"/>95.05 | <text:s text:c="4"/>95.05 | <text:s text:c="4"/>95.05 | <text:s text:c="4"/>95.05</text:p>
      <text:p text:style-name="P30">XPOS <text:s text:c="6"/>| <text:s text:c="4"/>49.72 | <text:s text:c="4"/>49.72 | <text:s text:c="4"/>49.72 | <text:s text:c="4"/>49.72</text:p>
      <text:p text:style-name="P30">UFeats <text:s text:c="4"/>| <text:s text:c="4"/>74.83 | <text:s text:c="4"/>74.83 | <text:s text:c="4"/>74.83 | <text:s text:c="4"/>74.83</text:p>
      <text:p text:style-name="P30">AllTags <text:s text:c="3"/>| <text:s text:c="4"/>48.73 | <text:s text:c="4"/>48.73 | <text:s text:c="4"/>48.73 | <text:s text:c="4"/>48.73</text:p>
      <text:p text:style-name="P30"><text:soft-page-break/>Lemmas <text:s text:c="4"/>| <text:s text:c="4"/>93.17 | <text:s text:c="4"/>93.17 | <text:s text:c="4"/>93.17 | <text:s text:c="4"/>93.17</text:p>
      <text:p text:style-name="P51">To nahoře je pomocí modelu FicTree 2.17. To dole je pomocí mého modelu natrénovaného na Etalonu 13.</text:p>
      <text:p text:style-name="P52">Metric <text:s text:c="4"/>| Precision | <text:s text:c="3"/>Recall | <text:s/>F1 Score | AligndAcc</text:p>
      <text:p text:style-name="P52">-----------+-----------+-----------+-----------+-----------</text:p>
      <text:p text:style-name="P53">UPOS <text:s text:c="6"/>| <text:s text:c="4"/>95.08 | <text:s text:c="4"/>95.08 | <text:s text:c="4"/>95.08 | <text:s text:c="4"/>95.08</text:p>
      <text:p text:style-name="P53">XPOS <text:s text:c="6"/>| <text:s text:c="4"/>83.96 | <text:s text:c="4"/>83.96 | <text:s text:c="4"/>83.96 | <text:s text:c="4"/>83.96</text:p>
      <text:p text:style-name="P53">UFeats <text:s text:c="4"/>| <text:s text:c="4"/>83.07 | <text:s text:c="4"/>83.07 | <text:s text:c="4"/>83.07 | <text:s text:c="4"/>83.07</text:p>
      <text:p text:style-name="P53">AllTags <text:s text:c="3"/>| <text:s text:c="4"/>81.35 | <text:s text:c="4"/>81.35 | <text:s text:c="4"/>81.35 | <text:s text:c="4"/>81.35</text:p>
      <text:p text:style-name="P53">Lemmas <text:s text:c="4"/>| <text:s text:c="4"/>90.15 | <text:s text:c="4"/>90.15 | <text:s text:c="4"/>90.15 | <text:s text:c="4"/>90.15</text:p>
      <text:p text:style-name="P54"><text:span text:style-name="T23">Teď</text:span> pomocí mého modelu natrénovaného na Etalonu 1<text:span text:style-name="T23">6</text:span>.</text:p>
      <text:p text:style-name="P55">Metric <text:s text:c="4"/>| Precision | <text:s text:c="3"/>Recall | <text:s/>F1 Score | AligndAcc</text:p>
      <text:p text:style-name="P55">-----------+-----------+-----------+-----------+-----------</text:p>
      <text:p text:style-name="P47">UPOS <text:s text:c="6"/>| <text:s text:c="4"/>95.65 | <text:s text:c="4"/>95.65 | <text:s text:c="4"/>95.65 | <text:s text:c="4"/>95.65</text:p>
      <text:p text:style-name="P47">XPOS <text:s text:c="6"/>| <text:s text:c="4"/>87.22 | <text:s text:c="4"/>87.22 | <text:s text:c="4"/>87.22 | <text:s text:c="4"/>87.22</text:p>
      <text:p text:style-name="P47">UFeats <text:s text:c="4"/>| <text:s text:c="4"/>86.00 | <text:s text:c="4"/>86.00 | <text:s text:c="4"/>86.00 | <text:s text:c="4"/>86.00</text:p>
      <text:p text:style-name="P47">AllTags <text:s text:c="3"/>| <text:s text:c="4"/>84.73 | <text:s text:c="4"/>84.73 | <text:s text:c="4"/>84.73 | <text:s text:c="4"/>84.73</text:p>
      <text:p text:style-name="P47">Lemmas <text:s text:c="4"/>| <text:s text:c="4"/>93.95 | <text:s text:c="4"/>93.95 | <text:s text:c="4"/>93.95 | <text:s text:c="4"/>93.95</text:p>
      <text:p text:style-name="P56"><text:span text:style-name="T23">Teď</text:span><text:span text:style-name="T30"> pomocí mého modelu natrénovaného na Etalonu 1</text:span><text:span text:style-name="T24">9</text:span><text:span text:style-name="T30">.</text:span></text:p>
      <text:p text:style-name="P55">Metric <text:s text:c="4"/>| Precision | <text:s text:c="3"/>Recall | <text:s/>F1 Score | AligndAcc</text:p>
      <text:p text:style-name="P55">-----------+-----------+-----------+-----------+-----------</text:p>
      <text:p text:style-name="P57">UPOS <text:s text:c="6"/>| <text:s text:c="4"/>98.50 | <text:s text:c="4"/>98.50 | <text:s text:c="4"/>98.50 | <text:s text:c="4"/>98.50</text:p>
      <text:p text:style-name="P57">XPOS <text:s text:c="6"/>| <text:s text:c="4"/>95.73 | <text:s text:c="4"/>95.73 | <text:s text:c="4"/>95.73 | <text:s text:c="4"/>95.73</text:p>
      <text:p text:style-name="P57">UFeats <text:s text:c="4"/>| <text:s text:c="4"/>95.65 | <text:s text:c="4"/>95.65 | <text:s text:c="4"/>95.65 | <text:s text:c="4"/>95.65</text:p>
      <text:p text:style-name="P57">AllTags <text:s text:c="3"/>| <text:s text:c="4"/>95.04 | <text:s text:c="4"/>95.04 | <text:s text:c="4"/>95.04 | <text:s text:c="4"/>95.04</text:p>
      <text:p text:style-name="P57">Lemmas <text:s text:c="4"/>| <text:s text:c="4"/>96.88 | <text:s text:c="4"/>96.88 | <text:s text:c="4"/>96.88 | <text:s text:c="4"/>96.88</text:p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6T23:15:38.217912800</dc:date>
    <dc:creator>Daniel Zeman</dc:creator>
    <meta:editing-duration>PT21H22M37S</meta:editing-duration>
    <meta:editing-cycles>37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149" meta:word-count="2019" meta:character-count="13533" meta:non-whitespace-character-count="10022"/>
  </office:meta>
</office:document-meta>
</file>