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10299" officeooo:paragraph-rsid="00110299"/>
    </style:style>
    <style:style style:name="P2" style:family="paragraph" style:parent-style-name="Text_20_body" style:list-style-name="L1">
      <style:text-properties officeooo:rsid="00110299" officeooo:paragraph-rsid="00110299" fo:background-color="#f6f9d4"/>
    </style:style>
    <style:style style:name="P3" style:family="paragraph" style:parent-style-name="Text_20_body" style:list-style-name="L1">
      <style:text-properties officeooo:rsid="00110299" officeooo:paragraph-rsid="00110299"/>
    </style:style>
    <style:style style:name="P4" style:family="paragraph" style:parent-style-name="Text_20_body" style:list-style-name="L1">
      <style:text-properties officeooo:rsid="00116150" officeooo:paragraph-rsid="00116150"/>
    </style:style>
    <style:style style:name="P5" style:family="paragraph" style:parent-style-name="Text_20_body" style:list-style-name="L1">
      <style:text-properties officeooo:rsid="0011d30d" officeooo:paragraph-rsid="0011d30d"/>
    </style:style>
    <style:style style:name="P6" style:family="paragraph" style:parent-style-name="Text_20_body" style:list-style-name="L1">
      <style:text-properties officeooo:rsid="001188d1" officeooo:paragraph-rsid="001188d1"/>
    </style:style>
    <style:style style:name="T1" style:family="text">
      <style:text-properties fo:background-color="#f6f9d4" loext:char-shading-value="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lán prací pro Hičkok</text:h>
      <text:list text:style-name="L1">
        <text:list-item>
          <text:p text:style-name="P2">Někde vyčlenit složky pro etalon 13-15 a etalon 16-18. Zkopírovat do nich soubory CoNLL-U s ruční morfologií od Staročechů. Ujistit se, že tyhle soubory jsou nějakým způsobem vyčištěné, např. neobsahují spoustu blbostí v MISC a mají jednotně dogenerované značky v XPOS. V podstatě by ty soubory měly vypadat tak, jako kdybychom je chtěli vydat.</text:p>
        </text:list-item>
        <text:list-item>
          <text:p text:style-name="P2">Podobným způsobem bych měl mít nachystaný i etalon 19, i když tam předchozí zpracování vypadalo jinak.</text:p>
        </text:list-item>
        <text:list-item>
          <text:p text:style-name="P3"><text:span text:style-name="T1">Všechny tři etalony zpracovat UDPipem natrénovaným na FicTree (resp. cs_all) z UD 2.17. UDPipe má na vstupu CoNLL-U soubory a nesmí měnit tokenizaci a segmentaci na věty.</text:span> Navíc chci, aby buď nesahal na morfologii (LEMMA, UPOS, XPOS, FEATS), nebo abych jeho výstup slil s existující ruční morfologií. Ve výsledku tedy bude segmentace, tokenizace a morfologie ruční, zatímco syntaxe bude predikovaná novočeským modelem.</text:p>
        </text:list-item>
        <text:list-item>
          <text:p text:style-name="P4">Změřit úspěšnost novočeského modelu v predikci morfologie (asi klidně na celých etalonech, se zlatou tokenizací na vstupu UDPipe; nicméně kvůli některým dalším pokusům si budu muset ještě vyčlenit menší testovací data a spočítat to i na nich).</text:p>
        </text:list-item>
        <text:list-item>
          <text:p text:style-name="P4">Na každém etalonu natrénovat nový model, který pak budeme používat k anotaci textů z příslušného období. Zlatá tokenizace a segmentace, syntaxe predikovaná novočeským modelem, morfologie zlatá. (Udělat totéž ještě i na podmnožině etalonu, která neobsahuje „testovací“ data. Čistě pro účely vyhodnocení a vzájemného srovnání modelů. Pro praktické nasazení budeme používat modely natrénované na celém etalonu.)</text:p>
          <text:list>
            <text:list-item>
              <text:p text:style-name="P5">Budu muset natrénovat i tokenizéry pomocí UDPipe 1. Jinak mi výsledný model nikdy správně neodtrhne částici <text:span text:style-name="T2">-ť</text:span><text:span text:style-name="T3">.</text:span></text:p>
            </text:list-item>
          </text:list>
        </text:list-item>
        <text:list-item>
          <text:p text:style-name="P4">Experimenty s kombinací trénovacích dat: Více etalonů dohromady, historická data v kombinaci s novočeskými daty.</text:p>
        </text:list-item>
        <text:list-item>
          <text:p text:style-name="P6">Všechny ostatní nápady, které jsme měli:</text:p>
          <text:list>
            <text:list-item>
              <text:p text:style-name="P6">Systematické vzájemné porovnání etalonů a jejich úprava, pak přetrénování všeho.</text:p>
            </text:list-item>
            <text:list-item>
              <text:p text:style-name="P6">Ruční syntaktická anotace (Bára, Lenka) a její zakomponování do modelů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 Zeman</meta:initial-creator>
    <meta:creation-date>2026-06-04T12:59:39.964664700</meta:creation-date>
    <dc:date>2026-06-04T23:07:04.968627200</dc:date>
    <dc:creator>Daniel Zeman</dc:creator>
    <meta:editing-duration>PT9H56M47S</meta:editing-duration>
    <meta:editing-cycles>5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1" meta:word-count="296" meta:character-count="1959" meta:non-whitespace-character-count="1684"/>
  </office:meta>
</office:document-meta>
</file>