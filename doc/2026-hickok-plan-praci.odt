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/>
    </style:style>
    <style:style style:name="P3" style:family="paragraph" style:parent-style-name="Text_20_body" style:list-style-name="L1">
      <style:text-properties officeooo:rsid="00116150" officeooo:paragraph-rsid="00116150"/>
    </style:style>
    <style:style style:name="P4" style:family="paragraph" style:parent-style-name="Text_20_body" style:list-style-name="L1">
      <style:text-properties officeooo:rsid="001188d1" officeooo:paragraph-rsid="001188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3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)</text:p>
        </text:list-item>
        <text:list-item>
          <text:p text:style-name="P3">Experimenty s kombinací trénovacích dat: Více etalonů dohromady, historická data v kombinaci s novočeskými daty.</text:p>
        </text:list-item>
        <text:list-item>
          <text:p text:style-name="P4">Všechny ostatní nápady, které jsme měli:</text:p>
          <text:list>
            <text:list-item>
              <text:p text:style-name="P4">Systematické vzájemné porovnání etalonů a jejich úprava, pak přetrénování všeho.</text:p>
            </text:list-item>
            <text:list-item>
              <text:p text:style-name="P4">Ruční syntaktická anotace (Bára, Lenka) a její zakomponování do modelů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4T15:44:57.170056600</dc:date>
    <dc:creator>Daniel Zeman</dc:creator>
    <meta:editing-duration>PT2H34M41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278" meta:character-count="1847" meta:non-whitespace-character-count="1588"/>
  </office:meta>
</office:document-meta>
</file>