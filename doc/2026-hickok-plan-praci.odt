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110299" officeooo:paragraph-rsid="00110299"/>
    </style:style>
    <style:style style:name="P2" style:family="paragraph" style:parent-style-name="Text_20_body" style:list-style-name="L1">
      <style:text-properties officeooo:rsid="00110299" officeooo:paragraph-rsid="00110299" fo:background-color="#f6f9d4"/>
    </style:style>
    <style:style style:name="P3" style:family="paragraph" style:parent-style-name="Text_20_body" style:list-style-name="L1">
      <style:text-properties officeooo:rsid="00110299" officeooo:paragraph-rsid="00110299" fo:background-color="#f6f9d4"/>
    </style:style>
    <style:style style:name="P4" style:family="paragraph" style:parent-style-name="Text_20_body" style:list-style-name="L1">
      <style:text-properties officeooo:rsid="00116150" officeooo:paragraph-rsid="00116150"/>
    </style:style>
    <style:style style:name="P5" style:family="paragraph" style:parent-style-name="Text_20_body" style:list-style-name="L1">
      <style:text-properties officeooo:rsid="0011d30d" officeooo:paragraph-rsid="0011d30d"/>
    </style:style>
    <style:style style:name="P6" style:family="paragraph" style:parent-style-name="Text_20_body" style:list-style-name="L1">
      <style:text-properties officeooo:rsid="001188d1" officeooo:paragraph-rsid="001188d1"/>
    </style:style>
    <style:style style:name="P7" style:family="paragraph" style:parent-style-name="Heading_20_1">
      <style:text-properties officeooo:rsid="00147183" officeooo:paragraph-rsid="00147183"/>
    </style:style>
    <style:style style:name="P8" style:family="paragraph" style:parent-style-name="Heading_20_2">
      <style:text-properties officeooo:rsid="00147183" officeooo:paragraph-rsid="00147183"/>
    </style:style>
    <style:style style:name="P9" style:family="paragraph" style:parent-style-name="Text_20_body">
      <style:text-properties officeooo:rsid="00147183" officeooo:paragraph-rsid="00147183"/>
    </style:style>
    <style:style style:name="P10" style:family="paragraph" style:parent-style-name="Text_20_body">
      <style:text-properties officeooo:rsid="001538a3" officeooo:paragraph-rsid="001538a3"/>
    </style:style>
    <style:style style:name="P11" style:family="paragraph" style:parent-style-name="Heading_20_3">
      <style:text-properties officeooo:rsid="00147183" officeooo:paragraph-rsid="00147183"/>
    </style:style>
    <style:style style:name="P12" style:family="paragraph" style:parent-style-name="Text_20_body">
      <style:text-properties style:font-name="Liberation Mono" fo:font-size="10pt" officeooo:paragraph-rsid="00147183" style:font-size-asian="10pt" style:font-size-complex="10pt"/>
    </style:style>
    <style:style style:name="P13" style:family="paragraph" style:parent-style-name="Text_20_body">
      <style:text-properties fo:color="#2a6099" loext:opacity="100%" style:font-name="Liberation Mono" fo:font-size="10pt" officeooo:paragraph-rsid="00147183" style:font-size-asian="10pt" style:font-size-complex="10pt"/>
    </style:style>
    <style:style style:name="P14" style:family="paragraph" style:parent-style-name="Heading_20_3">
      <style:text-properties officeooo:rsid="00147183" officeooo:paragraph-rsid="0016e61e"/>
    </style:style>
    <style:style style:name="P15" style:family="paragraph" style:parent-style-name="Text_20_body">
      <style:text-properties style:font-name="Liberation Mono" fo:font-size="10pt" officeooo:paragraph-rsid="0016e61e" style:font-size-asian="10pt" style:font-size-complex="10pt"/>
    </style:style>
    <style:style style:name="P16" style:family="paragraph" style:parent-style-name="Text_20_body">
      <style:text-properties fo:color="#2a6099" loext:opacity="100%" style:font-name="Liberation Mono" fo:font-size="10pt" officeooo:paragraph-rsid="0016e61e" style:font-size-asian="10pt" style:font-size-complex="10pt"/>
    </style:style>
    <style:style style:name="P17" style:family="paragraph" style:parent-style-name="Heading_20_3">
      <style:text-properties officeooo:paragraph-rsid="0016e61e"/>
    </style:style>
    <style:style style:name="P18" style:family="paragraph" style:parent-style-name="Text_20_body">
      <style:text-properties fo:color="#2a6099" loext:opacity="100%" style:font-name="Liberation Mono" fo:font-size="10pt" officeooo:paragraph-rsid="00170cfe" style:font-size-asian="10pt" style:font-size-complex="10pt"/>
    </style:style>
    <style:style style:name="P19" style:family="paragraph" style:parent-style-name="Heading_20_2">
      <style:text-properties officeooo:rsid="0017893d" officeooo:paragraph-rsid="0017893d"/>
    </style:style>
    <style:style style:name="P20" style:family="paragraph" style:parent-style-name="Text_20_body">
      <style:text-properties officeooo:rsid="0017893d" officeooo:paragraph-rsid="0017893d"/>
    </style:style>
    <style:style style:name="P21" style:family="paragraph" style:parent-style-name="Text_20_body">
      <style:text-properties fo:language="cs" fo:country="CZ" officeooo:rsid="0019bf0d" officeooo:paragraph-rsid="0017893d"/>
    </style:style>
    <style:style style:name="P22" style:family="paragraph" style:parent-style-name="Text_20_body">
      <style:text-properties fo:language="cs" fo:country="CZ" officeooo:rsid="001d4ded" officeooo:paragraph-rsid="001d4ded"/>
    </style:style>
    <style:style style:name="P23" style:family="paragraph" style:parent-style-name="Text_20_body">
      <style:text-properties fo:language="cs" fo:country="CZ" fo:font-weight="bold" officeooo:rsid="00202631" officeooo:paragraph-rsid="00202631" style:font-weight-asian="bold" style:font-weight-complex="bold"/>
    </style:style>
    <style:style style:name="P24" style:family="paragraph" style:parent-style-name="Text_20_body">
      <style:text-properties fo:language="cs" fo:country="CZ" fo:font-weight="bold" officeooo:rsid="0021aee3" officeooo:paragraph-rsid="0021aee3" style:font-weight-asian="bold" style:font-weight-complex="bold"/>
    </style:style>
    <style:style style:name="P25" style:family="paragraph" style:parent-style-name="Text_20_body">
      <style:text-properties fo:language="cs" fo:country="CZ" fo:font-weight="bold" officeooo:rsid="002444ee" officeooo:paragraph-rsid="002444ee" style:font-weight-asian="bold" style:font-weight-complex="bold"/>
    </style:style>
    <style:style style:name="P26" style:family="paragraph" style:parent-style-name="Text_20_body">
      <style:text-properties fo:language="cs" fo:country="CZ" fo:font-weight="bold" officeooo:rsid="0026f315" officeooo:paragraph-rsid="0026f315" style:font-weight-asian="bold" style:font-weight-complex="bold"/>
    </style:style>
    <style:style style:name="P27" style:family="paragraph" style:parent-style-name="Text_20_body">
      <style:text-properties fo:language="cs" fo:country="CZ" fo:font-weight="normal" officeooo:rsid="0026f315" officeooo:paragraph-rsid="0026f315" style:font-weight-asian="normal" style:font-weight-complex="normal"/>
    </style:style>
    <style:style style:name="T1" style:family="text">
      <style:text-properties fo:background-color="#f6f9d4" loext:char-shading-value="0"/>
    </style:style>
    <style:style style:name="T2" style:family="text">
      <style:text-properties officeooo:rsid="001c16f1" fo:background-color="#ffff00" loext:char-shading-value="0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background-color="#ffff00" loext:char-shading-value="0"/>
    </style:style>
    <style:style style:name="T6" style:family="text">
      <style:text-properties fo:color="#2a6099" loext:opacity="100%"/>
    </style:style>
    <style:style style:name="T7" style:family="text">
      <style:text-properties officeooo:rsid="0016e61e"/>
    </style:style>
    <style:style style:name="T8" style:family="text">
      <style:text-properties officeooo:rsid="00147183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4c0c2" style:font-weight-asian="bold" style:font-weight-complex="bold"/>
    </style:style>
    <style:style style:name="T11" style:family="text">
      <style:text-properties officeooo:rsid="0017988f"/>
    </style:style>
    <style:style style:name="T12" style:family="text">
      <style:text-properties officeooo:rsid="0017b6e9"/>
    </style:style>
    <style:style style:name="T13" style:family="text">
      <style:text-properties fo:language="en" fo:country="US" officeooo:rsid="0019bf0d"/>
    </style:style>
    <style:style style:name="T14" style:family="text">
      <style:text-properties fo:language="cs" fo:country="CZ" officeooo:rsid="0019bf0d"/>
    </style:style>
    <style:style style:name="T15" style:family="text">
      <style:text-properties officeooo:rsid="001f4922"/>
    </style:style>
    <style:style style:name="T16" style:family="text">
      <style:text-properties officeooo:rsid="00262299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21aee3" style:font-weight-asian="normal" style:font-weight-complex="normal"/>
    </style:style>
    <style:style style:name="T19" style:family="text">
      <style:text-properties fo:font-weight="normal" officeooo:rsid="002273f2" style:font-weight-asian="normal" style:font-weight-complex="normal"/>
    </style:style>
    <style:style style:name="T20" style:family="text">
      <style:text-properties fo:font-weight="normal" officeooo:rsid="0026f315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lán prací pro Hičkok</text:h>
      <text:list text:style-name="L1">
        <text:list-item>
          <text:p text:style-name="P2">Někde vyčlenit složky pro etalon 13-15 a etalon 16-18. Zkopírovat do nich soubory CoNLL-U s ruční morfologií od Staročechů. Ujistit se, že tyhle soubory jsou nějakým způsobem vyčištěné, např. neobsahují spoustu blbostí v MISC a mají jednotně dogenerované značky v XPOS. V podstatě by ty soubory měly vypadat tak, jako kdybychom je chtěli vydat.</text:p>
        </text:list-item>
        <text:list-item>
          <text:p text:style-name="P2">Podobným způsobem bych měl mít nachystaný i etalon 19, i když tam předchozí zpracování vypadalo jinak.</text:p>
        </text:list-item>
        <text:list-item>
          <text:p text:style-name="P3">Všechny tři etalony zpracovat UDPipem natrénovaným na FicTree (resp. cs_all) z UD 2.17. UDPipe má na vstupu CoNLL-U soubory a nesmí měnit tokenizaci a segmentaci na věty. Navíc chci, aby buď nesahal na morfologii (LEMMA, UPOS, XPOS, FEATS), nebo abych jeho výstup slil s existující ruční morfologií. Ve výsledku tedy bude segmentace, tokenizace a morfologie ruční, zatímco syntaxe bude predikovaná novočeským modelem.</text:p>
        </text:list-item>
        <text:list-item>
          <text:p text:style-name="P4"><text:span text:style-name="T1">Změřit úspěšnost novočeského modelu v predikci morfologie (asi klidně na celých etalonech, se zlatou tokenizací na vstupu UDPipe</text:span>; nicméně kvůli některým dalším pokusům si budu muset ještě vyčlenit menší testovací data a spočítat to i na nich).</text:p>
        </text:list-item>
        <text:list-item>
          <text:p text:style-name="P4">Na každém etalonu natrénovat nový model, který pak budeme používat k anotaci textů z příslušného období. Zlatá tokenizace a segmentace, syntaxe predikovaná novočeským modelem, morfologie zlatá. (Udělat totéž ještě i na podmnožině etalonu, která neobsahuje „testovací“ data. Čistě pro účely vyhodnocení a vzájemného srovnání modelů. Pro praktické nasazení budeme používat modely natrénované na celém etalonu. <text:span text:style-name="T2">Ale budu se muset zeptat Milana, jestli např. můžu při trénování dodat jen trénovací a žádná vývojová data.</text:span>)</text:p>
          <text:list>
            <text:list-item>
              <text:p text:style-name="P5">Budu muset natrénovat i tokenizéry pomocí UDPipe 1. Jinak mi výsledný model nikdy správně neodtrhne částici <text:span text:style-name="T3">-ť</text:span><text:span text:style-name="T4">.</text:span></text:p>
            </text:list-item>
          </text:list>
        </text:list-item>
        <text:list-item>
          <text:p text:style-name="P4">Experimenty s kombinací trénovacích dat: Více etalonů dohromady, historická data v kombinaci s novočeskými daty.</text:p>
        </text:list-item>
        <text:list-item>
          <text:p text:style-name="P6">Všechny ostatní nápady, které jsme měli:</text:p>
          <text:list>
            <text:list-item>
              <text:p text:style-name="P6">Systematické vzájemné porovnání etalonů a jejich úprava, pak přetrénování všeho.</text:p>
            </text:list-item>
            <text:list-item>
              <text:p text:style-name="P6">Ruční syntaktická anotace (Bára, Lenka) a její zakomponování do modelů.</text:p>
            </text:list-item>
          </text:list>
        </text:list-item>
      </text:list>
      <text:h text:style-name="P7" text:outline-level="1">Vyhodnocení UDPipe na etalonech</text:h>
      <text:h text:style-name="P8" text:outline-level="2">Pouze test</text:h>
      <text:p text:style-name="P9">V každém etalonu se všechny jeho soubory použijí jako testovací. Aplikuje se na ně UDPipe 2 s předtrénovaným modelem cs_fictree-ud-2.17-251125, pouze tagger (tokenizaci a segmentaci dostane zlatou, parser nepouštíme a nevyhodnocujeme, protože syntaxe není zlatá ani v etalonech).</text:p>
      <text:p text:style-name="P10">Následující hodnoty byly naměřeny <text:span text:style-name="T5">5.6.2026</text:span> na takovém tvaru etalonů, který v tu chvíli existoval. Později se ještě budou etalony upravovat, takže tato čísla vyjdou jinak.</text:p>
      <text:h text:style-name="P11" text:outline-level="3"><text:soft-page-break/>Etalon 13</text:h>
      <text:p text:style-name="P12">Metric <text:s text:c="4"/>| Precision | <text:s text:c="3"/>Recall | <text:s/>F1 Score | AligndAcc</text:p>
      <text:p text:style-name="P12">-----------+-----------+-----------+-----------+-----------</text:p>
      <text:p text:style-name="P12"><text:span text:style-name="T6">UPOS <text:s text:c="6"/>| <text:s text:c="4"/>92.04 | <text:s text:c="4"/>92.04 | <text:s text:c="4"/>92.04 | <text:s text:c="4"/>92.04</text:span></text:p>
      <text:p text:style-name="P13">XPOS <text:s text:c="6"/>| <text:s text:c="4"/>43.58 | <text:s text:c="4"/>43.58 | <text:s text:c="4"/>43.58 | <text:s text:c="4"/>43.58</text:p>
      <text:p text:style-name="P13">UFeats <text:s text:c="4"/>| <text:s text:c="4"/>65.29 | <text:s text:c="4"/>65.29 | <text:s text:c="4"/>65.29 | <text:s text:c="4"/>65.29</text:p>
      <text:p text:style-name="P13">AllTags <text:s text:c="3"/>| <text:s text:c="4"/>42.76 | <text:s text:c="4"/>42.76 | <text:s text:c="4"/>42.76 | <text:s text:c="4"/>42.76</text:p>
      <text:p text:style-name="P13">Lemmas <text:s text:c="4"/>| <text:s text:c="4"/>78.55 | <text:s text:c="4"/>78.55 | <text:s text:c="4"/>78.55 | <text:s text:c="4"/>78.55</text:p>
      <text:h text:style-name="P14" text:outline-level="3">Etalon 1<text:span text:style-name="T7">6</text:span></text:h>
      <text:p text:style-name="P15">Metric <text:s text:c="4"/>| Precision | <text:s text:c="3"/>Recall | <text:s/>F1 Score | AligndAcc</text:p>
      <text:p text:style-name="P15">-----------+-----------+-----------+-----------+-----------</text:p>
      <text:p text:style-name="P16">UPOS <text:s text:c="6"/>| <text:s text:c="4"/>96.27 | <text:s text:c="4"/>96.27 | <text:s text:c="4"/>96.27 | <text:s text:c="4"/>96.27</text:p>
      <text:p text:style-name="P16">XPOS <text:s text:c="6"/>| <text:s text:c="4"/>48.61 | <text:s text:c="4"/>48.61 | <text:s text:c="4"/>48.61 | <text:s text:c="4"/>48.61</text:p>
      <text:p text:style-name="P16">UFeats <text:s text:c="4"/>| <text:s text:c="4"/>71.92 | <text:s text:c="4"/>71.92 | <text:s text:c="4"/>71.92 | <text:s text:c="4"/>71.92</text:p>
      <text:p text:style-name="P16">AllTags <text:s text:c="3"/>| <text:s text:c="4"/>47.51 | <text:s text:c="4"/>47.51 | <text:s text:c="4"/>47.51 | <text:s text:c="4"/>47.51</text:p>
      <text:p text:style-name="P16">Lemmas <text:s text:c="4"/>| <text:s text:c="4"/>90.25 | <text:s text:c="4"/>90.25 | <text:s text:c="4"/>90.25 | <text:s text:c="4"/>90.25</text:p>
      <text:h text:style-name="P17" text:outline-level="3"><text:span text:style-name="T8">Etalon 1</text:span><text:span text:style-name="T7">9</text:span></text:h>
      <text:p text:style-name="P15">Metric <text:s text:c="4"/>| Precision | <text:s text:c="3"/>Recall | <text:s/>F1 Score | AligndAcc</text:p>
      <text:p text:style-name="P15">-----------+-----------+-----------+-----------+-----------</text:p>
      <text:p text:style-name="P18">UPOS <text:s text:c="6"/>| <text:s text:c="4"/>95.10 | <text:s text:c="4"/>95.10 | <text:s text:c="4"/>95.10 | <text:s text:c="4"/>95.10</text:p>
      <text:p text:style-name="P18">XPOS <text:s text:c="6"/>| <text:s text:c="4"/>49.98 | <text:s text:c="4"/>49.98 | <text:s text:c="4"/>49.98 | <text:s text:c="4"/>49.98</text:p>
      <text:p text:style-name="P18">UFeats <text:s text:c="4"/>| <text:s text:c="4"/>76.81 | <text:s text:c="4"/>76.81 | <text:s text:c="4"/>76.81 | <text:s text:c="4"/>76.81</text:p>
      <text:p text:style-name="P18">AllTags <text:s text:c="3"/>| <text:s text:c="4"/>49.11 | <text:s text:c="4"/>49.11 | <text:s text:c="4"/>49.11 | <text:s text:c="4"/>49.11</text:p>
      <text:p text:style-name="P18">Lemmas <text:s text:c="4"/>| <text:s text:c="4"/>93.42 | <text:s text:c="4"/>93.42 | <text:s text:c="4"/>93.42 | <text:s text:c="4"/>93.42</text:p>
      <text:h text:style-name="P19" text:outline-level="2">Kandidáti na test</text:h>
      <text:p text:style-name="P20"><text:span text:style-name="T9">E13 </text:span><text:span text:style-name="T10">dev</text:span><text:span text:style-name="T9">:</text:span> 005_umuc_rajhr (veršovaný, 1350), <text:span text:style-name="T11">017_pas_muz_a (druhá půlka 14. stol., život svatého Mauricia)., </text:span><text:span text:style-name="T12">030_lek_frant_muz (lékařský spis, 1444), </text:span><text:span text:style-name="T13">040_let_a </text:span><text:span text:style-name="T14">(letopisy, 1475)</text:span></text:p>
      <text:p text:style-name="P21">[07:54:36]zen:/net/work/people/zeman/hickok-data(master)&gt; cat etalon13_parsed/005_umuc_rajhr.conllu etalon13_parsed/017_pas_muz_a.conllu etalon13_parsed/030_lek_frant_muz.conllu etalon13_parsed/040_let_a.conllu | wcc</text:p>
      <text:p text:style-name="P21">393 sentences, <text:span text:style-name="T9">9558</text:span> morphosyntactic words, 9438 surface tokens (including 120 multiword tokens spanning 240 words)</text:p>
      <text:p text:style-name="P22"><text:span text:style-name="T10">E13 test</text:span><text:span text:style-name="T9">:</text:span> 010_bibl_drazd_mt (<text:span text:style-name="T15">1365, </text:span>část Matoušova evangelia v Bibli drážďanské), <text:span text:style-name="T15">019_rada_otc_r (konec 14. století, rada otce synovi), 033_prav_svab_c (1448, právní sborník)</text:span>, 042_pov_ol (druhá půlka 15. stol., Olomoucké povídky).</text:p>
      <text:p text:style-name="P22"><text:soft-page-break/>[10:42:19]zen:/net/work/people/zeman/hickok-data(master)&gt; cat etalon13_parsed/010_bibl_drazd_mt.conllu etalon13_parsed/042_pov_ol.conllu etalon13_parsed/033_prav_svab_c.conllu etalon13_parsed/019_rada_otc_r.conllu | wcc</text:p>
      <text:p text:style-name="P22">412 sentences, <text:span text:style-name="T9">9358</text:span> morphosyntactic words, 9265 surface tokens (including 93 multiword tokens spanning 186 words)</text:p>
      <text:p text:style-name="P23">E16 <text:span text:style-name="T16">dev</text:span>:<text:span text:style-name="T17"> </text:span><text:span text:style-name="T18">049_frantovy_prava (1518), 065_o_ctnych_manzelkach_tehotnych (1615), 076_smol_jimr (soudní zápis, 1726) … 9691 slov</text:span></text:p>
      <text:p text:style-name="P24">E16 <text:span text:style-name="T16">test</text:span>:<text:span text:style-name="T17"> 050_hanus (1538), </text:span><text:span text:style-name="T19">063_div_velik (1612), 080_pranostika_nova (1766) … 9556 slov</text:span></text:p>
      <text:p text:style-name="P25">E19 <text:span text:style-name="T16">dev</text:span>:<text:span text:style-name="T17"> 1802_krameriusovy_noviny_21.8.1802, 1832_svihlik_edmund_a_belinka, 1855_stroupeznicka_boure, </text:span><text:span text:style-name="T20">1869_jaros_z_chladku … 8897 slov</text:span></text:p>
      <text:p text:style-name="P26">E19 test:<text:span text:style-name="T17"> 1808_kramerius_vyd_rozlicne_povidacky, 1827_rettigova_bila_ruze, 1846_prazske_noviny_19.3.1846, 1874_palacky_nejnovejsi_politicke_uvahy … 8891 slov</text:span></text:p>
      <text:p text:style-name="P2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Daniel Zeman</meta:initial-creator>
    <meta:creation-date>2026-06-04T12:59:39.964664700</meta:creation-date>
    <dc:date>2026-06-05T17:37:07.668702300</dc:date>
    <dc:creator>Daniel Zeman</dc:creator>
    <meta:editing-duration>PT15H45M56S</meta:editing-duration>
    <meta:editing-cycles>21</meta:editing-cycles>
    <meta:generator>LibreOffice/25.2.7.2$Windows_X86_64 LibreOffice_project/5cbfd1ab6520636bb5f7b99185aa69bd7456825d</meta:generator>
    <meta:document-statistic meta:table-count="0" meta:image-count="0" meta:object-count="0" meta:page-count="3" meta:paragraph-count="50" meta:word-count="708" meta:character-count="5390" meta:non-whitespace-character-count="4421"/>
  </office:meta>
</office:document-meta>
</file>