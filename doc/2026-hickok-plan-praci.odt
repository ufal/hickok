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/>
    </style:style>
    <style:style style:name="P4" style:family="paragraph" style:parent-style-name="Text_20_body" style:list-style-name="L1">
      <style:text-properties officeooo:rsid="00316b01" officeooo:paragraph-rsid="00316b01"/>
    </style:style>
    <style:style style:name="P5" style:family="paragraph" style:parent-style-name="Text_20_body" style:list-style-name="L1">
      <style:text-properties officeooo:rsid="001188d1" officeooo:paragraph-rsid="001188d1"/>
    </style:style>
    <style:style style:name="P6" style:family="paragraph" style:parent-style-name="Heading_20_1">
      <style:text-properties officeooo:rsid="00147183" officeooo:paragraph-rsid="00147183"/>
    </style:style>
    <style:style style:name="P7" style:family="paragraph" style:parent-style-name="Heading_20_2">
      <style:text-properties officeooo:rsid="00147183" officeooo:paragraph-rsid="00147183"/>
    </style:style>
    <style:style style:name="P8" style:family="paragraph" style:parent-style-name="Text_20_body">
      <style:text-properties officeooo:rsid="00147183" officeooo:paragraph-rsid="00147183"/>
    </style:style>
    <style:style style:name="P9" style:family="paragraph" style:parent-style-name="Text_20_body">
      <style:text-properties officeooo:rsid="001538a3" officeooo:paragraph-rsid="001538a3"/>
    </style:style>
    <style:style style:name="P10" style:family="paragraph" style:parent-style-name="Heading_20_3">
      <style:text-properties officeooo:rsid="00147183" officeooo:paragraph-rsid="00147183"/>
    </style:style>
    <style:style style:name="P11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2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3" style:family="paragraph" style:parent-style-name="Heading_20_3">
      <style:text-properties officeooo:rsid="00147183" officeooo:paragraph-rsid="0016e61e"/>
    </style:style>
    <style:style style:name="P14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15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16" style:family="paragraph" style:parent-style-name="Heading_20_3">
      <style:text-properties officeooo:paragraph-rsid="0016e61e"/>
    </style:style>
    <style:style style:name="P17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18" style:family="paragraph" style:parent-style-name="Heading_20_2">
      <style:text-properties officeooo:rsid="0017893d" officeooo:paragraph-rsid="0017893d"/>
    </style:style>
    <style:style style:name="P19" style:family="paragraph" style:parent-style-name="Text_20_body">
      <style:text-properties officeooo:rsid="0028a28b" officeooo:paragraph-rsid="0028a28b"/>
    </style:style>
    <style:style style:name="P20" style:family="paragraph" style:parent-style-name="Heading_20_3">
      <style:text-properties officeooo:rsid="0028a28b" officeooo:paragraph-rsid="0028a28b"/>
    </style:style>
    <style:style style:name="P21" style:family="paragraph" style:parent-style-name="Text_20_body">
      <style:text-properties officeooo:rsid="0017893d" officeooo:paragraph-rsid="0017893d"/>
    </style:style>
    <style:style style:name="P22" style:family="paragraph" style:parent-style-name="Text_20_body">
      <style:text-properties fo:language="cs" fo:country="CZ" officeooo:rsid="001d4ded" officeooo:paragraph-rsid="001d4ded"/>
    </style:style>
    <style:style style:name="P23" style:family="paragraph" style:parent-style-name="Text_20_body">
      <style:text-properties style:font-name="Liberation Mono" fo:font-size="10pt" officeooo:paragraph-rsid="00293f68" style:font-size-asian="10pt" style:font-size-complex="10pt"/>
    </style:style>
    <style:style style:name="P24" style:family="paragraph" style:parent-style-name="Text_20_body">
      <style:text-properties fo:color="#2a6099" loext:opacity="100%" style:font-name="Liberation Mono" fo:font-size="10pt" officeooo:paragraph-rsid="00293f68" style:font-size-asian="10pt" style:font-size-complex="10pt"/>
    </style:style>
    <style:style style:name="P25" style:family="paragraph" style:parent-style-name="Text_20_body">
      <style:text-properties officeooo:rsid="002b3eb0" officeooo:paragraph-rsid="002b3eb0"/>
    </style:style>
    <style:style style:name="P26" style:family="paragraph" style:parent-style-name="Text_20_body">
      <style:text-properties style:font-name="Liberation Mono" fo:font-size="10pt" officeooo:paragraph-rsid="002b3eb0" style:font-size-asian="10pt" style:font-size-complex="10pt"/>
    </style:style>
    <style:style style:name="P27" style:family="paragraph" style:parent-style-name="Text_20_body">
      <style:text-properties fo:color="#ff4000" loext:opacity="100%" style:font-name="Liberation Mono" fo:font-size="10pt" officeooo:paragraph-rsid="002b3eb0" style:font-size-asian="10pt" style:font-size-complex="10pt"/>
    </style:style>
    <style:style style:name="P28" style:family="paragraph" style:parent-style-name="Text_20_body">
      <style:text-properties officeooo:rsid="002b3eb0" officeooo:paragraph-rsid="002cf2e0"/>
    </style:style>
    <style:style style:name="P29" style:family="paragraph" style:parent-style-name="Text_20_body">
      <style:text-properties style:font-name="Liberation Mono" fo:font-size="10pt" officeooo:paragraph-rsid="002cf2e0" style:font-size-asian="10pt" style:font-size-complex="10pt"/>
    </style:style>
    <style:style style:name="P30" style:family="paragraph" style:parent-style-name="Text_20_body">
      <style:text-properties fo:color="#2a6099" loext:opacity="100%" style:font-name="Liberation Mono" fo:font-size="10pt" officeooo:paragraph-rsid="002cf2e0" style:font-size-asian="10pt" style:font-size-complex="10pt"/>
    </style:style>
    <style:style style:name="P31" style:family="paragraph" style:parent-style-name="Heading_20_3">
      <style:text-properties officeooo:rsid="0028a28b" officeooo:paragraph-rsid="002cf2e0"/>
    </style:style>
    <style:style style:name="P32" style:family="paragraph" style:parent-style-name="Text_20_body">
      <style:text-properties fo:language="cs" fo:country="CZ" officeooo:rsid="00202631" officeooo:paragraph-rsid="00202631"/>
    </style:style>
    <style:style style:name="P33" style:family="paragraph" style:parent-style-name="Text_20_body">
      <style:text-properties fo:language="cs" fo:country="CZ" fo:font-weight="bold" officeooo:rsid="0021aee3" officeooo:paragraph-rsid="0021aee3" style:font-weight-asian="bold" style:font-weight-complex="bold"/>
    </style:style>
    <style:style style:name="P34" style:family="paragraph" style:parent-style-name="Text_20_body">
      <style:text-properties officeooo:rsid="002b3eb0" officeooo:paragraph-rsid="002c444a"/>
    </style:style>
    <style:style style:name="P35" style:family="paragraph" style:parent-style-name="Text_20_body">
      <style:text-properties style:font-name="Liberation Mono" fo:font-size="10pt" officeooo:paragraph-rsid="002c444a" style:font-size-asian="10pt" style:font-size-complex="10pt"/>
    </style:style>
    <style:style style:name="P36" style:family="paragraph" style:parent-style-name="Text_20_body">
      <style:text-properties fo:color="#2a6099" loext:opacity="100%" style:font-name="Liberation Mono" fo:font-size="10pt" officeooo:paragraph-rsid="002c444a" style:font-size-asian="10pt" style:font-size-complex="10pt"/>
    </style:style>
    <style:style style:name="P37" style:family="paragraph" style:parent-style-name="Text_20_body">
      <style:text-properties officeooo:rsid="002b3eb0" officeooo:paragraph-rsid="002eaad6"/>
    </style:style>
    <style:style style:name="P38" style:family="paragraph" style:parent-style-name="Text_20_body">
      <style:text-properties style:font-name="Liberation Mono" fo:font-size="10pt" officeooo:paragraph-rsid="002eaad6" style:font-size-asian="10pt" style:font-size-complex="10pt"/>
    </style:style>
    <style:style style:name="P39" style:family="paragraph" style:parent-style-name="Text_20_body">
      <style:text-properties fo:color="#ff4000" loext:opacity="100%" style:font-name="Liberation Mono" fo:font-size="10pt" officeooo:paragraph-rsid="002eaad6" style:font-size-asian="10pt" style:font-size-complex="10pt"/>
    </style:style>
    <style:style style:name="P40" style:family="paragraph" style:parent-style-name="Text_20_body">
      <style:text-properties officeooo:paragraph-rsid="002eaad6"/>
    </style:style>
    <style:style style:name="P41" style:family="paragraph" style:parent-style-name="Text_20_body">
      <style:text-properties fo:color="#2a6099" loext:opacity="100%" style:font-name="Liberation Mono" fo:font-size="10pt" officeooo:paragraph-rsid="002f71d8" style:font-size-asian="10pt" style:font-size-complex="10pt"/>
    </style:style>
    <style:style style:name="P42" style:family="paragraph" style:parent-style-name="Heading_20_3">
      <style:text-properties officeooo:rsid="0028a28b" officeooo:paragraph-rsid="002eaad6"/>
    </style:style>
    <style:style style:name="P43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44" style:family="paragraph" style:parent-style-name="Text_20_body">
      <style:text-properties fo:language="cs" fo:country="CZ" fo:font-weight="bold" officeooo:rsid="0026f315" officeooo:paragraph-rsid="0026f315" style:font-weight-asian="bold" style:font-weight-complex="bold"/>
    </style:style>
    <style:style style:name="P45" style:family="paragraph" style:parent-style-name="Text_20_body">
      <style:text-properties officeooo:rsid="002b3eb0" officeooo:paragraph-rsid="002ca51d"/>
    </style:style>
    <style:style style:name="P46" style:family="paragraph" style:parent-style-name="Text_20_body">
      <style:text-properties style:font-name="Liberation Mono" fo:font-size="10pt" officeooo:paragraph-rsid="002ca51d" style:font-size-asian="10pt" style:font-size-complex="10pt"/>
    </style:style>
    <style:style style:name="P47" style:family="paragraph" style:parent-style-name="Text_20_body">
      <style:text-properties fo:color="#2a6099" loext:opacity="100%" style:font-name="Liberation Mono" fo:font-size="10pt" officeooo:paragraph-rsid="002ca51d" style:font-size-asian="10pt" style:font-size-complex="10pt"/>
    </style:style>
    <style:style style:name="P48" style:family="paragraph" style:parent-style-name="Text_20_body">
      <style:text-properties officeooo:rsid="002b3eb0" officeooo:paragraph-rsid="002f71d8"/>
    </style:style>
    <style:style style:name="P49" style:family="paragraph" style:parent-style-name="Text_20_body">
      <style:text-properties style:font-name="Liberation Mono" fo:font-size="10pt" officeooo:paragraph-rsid="002f71d8" style:font-size-asian="10pt" style:font-size-complex="10pt"/>
    </style:style>
    <style:style style:name="P50" style:family="paragraph" style:parent-style-name="Text_20_body">
      <style:text-properties officeooo:paragraph-rsid="002f71d8"/>
    </style:style>
    <style:style style:name="P51" style:family="paragraph" style:parent-style-name="Text_20_body">
      <style:text-properties fo:color="#ff4000" loext:opacity="100%" style:font-name="Liberation Mono" fo:font-size="10pt" officeooo:paragraph-rsid="002f71d8" style:font-size-asian="10pt" style:font-size-complex="10pt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6e61e"/>
    </style:style>
    <style:style style:name="T5" style:family="text">
      <style:text-properties officeooo:rsid="00147183"/>
    </style:style>
    <style:style style:name="T6" style:family="text">
      <style:text-properties officeooo:rsid="0028a28b"/>
    </style:style>
    <style:style style:name="T7" style:family="text">
      <style:text-properties fo:font-weight="bold" officeooo:rsid="0028a28b" style:font-weight-asian="bold" style:font-weight-complex="bold"/>
    </style:style>
    <style:style style:name="T8" style:family="text">
      <style:text-properties fo:font-weight="bold" officeooo:rsid="0024c0c2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7988f"/>
    </style:style>
    <style:style style:name="T11" style:family="text">
      <style:text-properties officeooo:rsid="0017b6e9"/>
    </style:style>
    <style:style style:name="T12" style:family="text">
      <style:text-properties fo:language="en" fo:country="US" officeooo:rsid="0019bf0d"/>
    </style:style>
    <style:style style:name="T13" style:family="text">
      <style:text-properties fo:language="cs" fo:country="CZ" officeooo:rsid="0019bf0d"/>
    </style:style>
    <style:style style:name="T14" style:family="text">
      <style:text-properties fo:language="cs" fo:country="CZ" officeooo:rsid="0028a28b"/>
    </style:style>
    <style:style style:name="T15" style:family="text">
      <style:text-properties officeooo:rsid="001f4922"/>
    </style:style>
    <style:style style:name="T16" style:family="text">
      <style:text-properties officeooo:rsid="002cf2e0"/>
    </style:style>
    <style:style style:name="T17" style:family="text">
      <style:text-properties officeooo:rsid="002eaad6"/>
    </style:style>
    <style:style style:name="T18" style:family="text">
      <style:text-properties fo:font-weight="bold" officeooo:rsid="00262299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aee3" style:font-weight-asian="normal" style:font-weight-complex="normal"/>
    </style:style>
    <style:style style:name="T21" style:family="text">
      <style:text-properties officeooo:rsid="00262299"/>
    </style:style>
    <style:style style:name="T22" style:family="text">
      <style:text-properties fo:font-weight="normal" officeooo:rsid="002273f2" style:font-weight-asian="normal" style:font-weight-complex="normal"/>
    </style:style>
    <style:style style:name="T23" style:family="text">
      <style:text-properties officeooo:rsid="002b3eb0"/>
    </style:style>
    <style:style style:name="T24" style:family="text">
      <style:text-properties fo:font-weight="normal" officeooo:rsid="0026f31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<text:span text:style-name="T1">Změřit úspěšnost novočeského modelu v predikci morfologie (asi klidně na celých etalonech, se zlatou tokenizací na vstupu UDPipe; nicméně kvůli některým dalším pokusům si budu muset ještě vyčlenit menší testovací data a spočítat to i na nich).</text:span></text:p>
        </text:list-item>
        <text:list-item>
          <text:p text:style-name="P3"><text:span text:style-name="T1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</text:span> Pro praktické nasazení budeme používat modely natrénované na celém etalonu. <text:span text:style-name="T2">Ale budu se muset zeptat Milana, jestli např. můžu při trénování dodat jen trénovací a žádná vývojová data.</text:span>)</text:p>
        </text:list-item>
        <text:list-item>
          <text:p text:style-name="P4">Označkovat monitorovací korpus etalonovými modely.</text:p>
        </text:list-item>
        <text:list-item>
          <text:p text:style-name="P3">Experimenty s kombinací trénovacích dat: Více etalonů dohromady, historická data v kombinaci s novočeskými daty.</text:p>
        </text:list-item>
        <text:list-item>
          <text:p text:style-name="P5">Všechny ostatní nápady, které jsme měli:</text:p>
          <text:list>
            <text:list-item>
              <text:p text:style-name="P5">Systematické vzájemné porovnání etalonů a jejich úprava, pak přetrénování všeho.</text:p>
            </text:list-item>
            <text:list-item>
              <text:p text:style-name="P5">Ruční syntaktická anotace (Bára, Lenka) a její zakomponování do modelů.</text:p>
            </text:list-item>
          </text:list>
        </text:list-item>
      </text:list>
      <text:h text:style-name="P6" text:outline-level="1">Vyhodnocení UDPipe na etalonech</text:h>
      <text:h text:style-name="P7" text:outline-level="2">Pouze test</text:h>
      <text:p text:style-name="P8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9">Následující hodnoty byly naměřeny <text:span text:style-name="T3">5.6.2026</text:span> na takovém tvaru etalonů, který v tu chvíli existoval. Později se ještě budou etalony upravovat, takže tato čísla vyjdou jinak.</text:p>
      <text:h text:style-name="P10" text:outline-level="3">Etalon 13</text:h>
      <text:p text:style-name="P11">Metric <text:s text:c="4"/>| Precision | <text:s text:c="3"/>Recall | <text:s/>F1 Score | AligndAcc</text:p>
      <text:p text:style-name="P11"><text:soft-page-break/>-----------+-----------+-----------+-----------+-----------</text:p>
      <text:p text:style-name="P12">UPOS <text:s text:c="6"/>| <text:s text:c="4"/>92.04 | <text:s text:c="4"/>92.04 | <text:s text:c="4"/>92.04 | <text:s text:c="4"/>92.04</text:p>
      <text:p text:style-name="P12">XPOS <text:s text:c="6"/>| <text:s text:c="4"/>43.58 | <text:s text:c="4"/>43.58 | <text:s text:c="4"/>43.58 | <text:s text:c="4"/>43.58</text:p>
      <text:p text:style-name="P12">UFeats <text:s text:c="4"/>| <text:s text:c="4"/>65.29 | <text:s text:c="4"/>65.29 | <text:s text:c="4"/>65.29 | <text:s text:c="4"/>65.29</text:p>
      <text:p text:style-name="P12">AllTags <text:s text:c="3"/>| <text:s text:c="4"/>42.76 | <text:s text:c="4"/>42.76 | <text:s text:c="4"/>42.76 | <text:s text:c="4"/>42.76</text:p>
      <text:p text:style-name="P12">Lemmas <text:s text:c="4"/>| <text:s text:c="4"/>78.55 | <text:s text:c="4"/>78.55 | <text:s text:c="4"/>78.55 | <text:s text:c="4"/>78.55</text:p>
      <text:h text:style-name="P13" text:outline-level="3">Etalon 1<text:span text:style-name="T4">6</text:span></text:h>
      <text:p text:style-name="P14">Metric <text:s text:c="4"/>| Precision | <text:s text:c="3"/>Recall | <text:s/>F1 Score | AligndAcc</text:p>
      <text:p text:style-name="P14">-----------+-----------+-----------+-----------+-----------</text:p>
      <text:p text:style-name="P15">UPOS <text:s text:c="6"/>| <text:s text:c="4"/>96.27 | <text:s text:c="4"/>96.27 | <text:s text:c="4"/>96.27 | <text:s text:c="4"/>96.27</text:p>
      <text:p text:style-name="P15">XPOS <text:s text:c="6"/>| <text:s text:c="4"/>48.61 | <text:s text:c="4"/>48.61 | <text:s text:c="4"/>48.61 | <text:s text:c="4"/>48.61</text:p>
      <text:p text:style-name="P15">UFeats <text:s text:c="4"/>| <text:s text:c="4"/>71.92 | <text:s text:c="4"/>71.92 | <text:s text:c="4"/>71.92 | <text:s text:c="4"/>71.92</text:p>
      <text:p text:style-name="P15">AllTags <text:s text:c="3"/>| <text:s text:c="4"/>47.51 | <text:s text:c="4"/>47.51 | <text:s text:c="4"/>47.51 | <text:s text:c="4"/>47.51</text:p>
      <text:p text:style-name="P15">Lemmas <text:s text:c="4"/>| <text:s text:c="4"/>90.25 | <text:s text:c="4"/>90.25 | <text:s text:c="4"/>90.25 | <text:s text:c="4"/>90.25</text:p>
      <text:h text:style-name="P16" text:outline-level="3"><text:span text:style-name="T5">Etalon 1</text:span><text:span text:style-name="T4">9</text:span></text:h>
      <text:p text:style-name="P14">Metric <text:s text:c="4"/>| Precision | <text:s text:c="3"/>Recall | <text:s/>F1 Score | AligndAcc</text:p>
      <text:p text:style-name="P14">-----------+-----------+-----------+-----------+-----------</text:p>
      <text:p text:style-name="P17">UPOS <text:s text:c="6"/>| <text:s text:c="4"/>95.10 | <text:s text:c="4"/>95.10 | <text:s text:c="4"/>95.10 | <text:s text:c="4"/>95.10</text:p>
      <text:p text:style-name="P17">XPOS <text:s text:c="6"/>| <text:s text:c="4"/>49.98 | <text:s text:c="4"/>49.98 | <text:s text:c="4"/>49.98 | <text:s text:c="4"/>49.98</text:p>
      <text:p text:style-name="P17">UFeats <text:s text:c="4"/>| <text:s text:c="4"/>76.81 | <text:s text:c="4"/>76.81 | <text:s text:c="4"/>76.81 | <text:s text:c="4"/>76.81</text:p>
      <text:p text:style-name="P17">AllTags <text:s text:c="3"/>| <text:s text:c="4"/>49.11 | <text:s text:c="4"/>49.11 | <text:s text:c="4"/>49.11 | <text:s text:c="4"/>49.11</text:p>
      <text:p text:style-name="P17">Lemmas <text:s text:c="4"/>| <text:s text:c="4"/>93.42 | <text:s text:c="4"/>93.42 | <text:s text:c="4"/>93.42 | <text:s text:c="4"/>93.42</text:p>
      <text:h text:style-name="P18" text:outline-level="2">Kandidáti na <text:span text:style-name="T6">dev a </text:span>test</text:h>
      <text:p text:style-name="P19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0" text:outline-level="3">Etalon 13</text:h>
      <text:p text:style-name="P21"><text:span text:style-name="T7">D</text:span><text:span text:style-name="T8">ev</text:span><text:span text:style-name="T9">:</text:span> 005_umuc_rajhr (veršovaný, 1350), <text:span text:style-name="T10">017_pas_muz_a (druhá půlka 14. stol., život svatého Mauricia)., </text:span><text:span text:style-name="T11">030_lek_frant_muz (lékařský spis, 1444), </text:span><text:span text:style-name="T12">040_let_a </text:span><text:span text:style-name="T13">(letopisy, 1475) … </text:span><text:span text:style-name="T14">9558 slov.</text:span></text:p>
      <text:p text:style-name="P22"><text:span text:style-name="T7">T</text:span><text:span text:style-name="T8">est</text:span><text:span text:style-name="T9">:</text:span> 010_bibl_drazd_mt (<text:span text:style-name="T15">1365, </text:span>část Matoušova evangelia v Bibli drážďanské), <text:span text:style-name="T15">019_rada_otc_r (konec 14. století, rada otce synovi), 033_prav_svab_c (1448, právní sborník)</text:span>, 042_pov_ol (druhá půlka 15. stol., Olomoucké povídky) … <text:span text:style-name="T6">9358 slov.</text:span></text:p>
      <text:p text:style-name="P23"><text:soft-page-break/>Metric <text:s text:c="4"/>| Precision | <text:s text:c="3"/>Recall | <text:s/>F1 Score | AligndAcc</text:p>
      <text:p text:style-name="P23">-----------+-----------+-----------+-----------+-----------</text:p>
      <text:p text:style-name="P24">UPOS <text:s text:c="6"/>| <text:s text:c="4"/>92.64 | <text:s text:c="4"/>92.64 | <text:s text:c="4"/>92.64 | <text:s text:c="4"/>92.64</text:p>
      <text:p text:style-name="P24">XPOS <text:s text:c="6"/>| <text:s text:c="4"/>43.16 | <text:s text:c="4"/>43.16 | <text:s text:c="4"/>43.16 | <text:s text:c="4"/>43.16</text:p>
      <text:p text:style-name="P24">UFeats <text:s text:c="4"/>| <text:s text:c="4"/>65.77 | <text:s text:c="4"/>65.77 | <text:s text:c="4"/>65.77 | <text:s text:c="4"/>65.77</text:p>
      <text:p text:style-name="P24">AllTags <text:s text:c="3"/>| <text:s text:c="4"/>42.19 | <text:s text:c="4"/>42.19 | <text:s text:c="4"/>42.19 | <text:s text:c="4"/>42.19</text:p>
      <text:p text:style-name="P24">Lemmas <text:s text:c="4"/>| <text:s text:c="4"/>78.19 | <text:s text:c="4"/>78.19 | <text:s text:c="4"/>78.19 | <text:s text:c="4"/>78.19</text:p>
      <text:p text:style-name="P25">To nahoře je pomocí modelu FicTree 2.17. To dole je pomocí mého modelu natrénovaného na Etalonu 13.</text:p>
      <text:p text:style-name="P26">Metric <text:s text:c="4"/>| Precision | <text:s text:c="3"/>Recall | <text:s/>F1 Score | AligndAcc</text:p>
      <text:p text:style-name="P26">-----------+-----------+-----------+-----------+-----------</text:p>
      <text:p text:style-name="P27">UPOS <text:s text:c="6"/>| <text:s text:c="4"/>97.87 | <text:s text:c="4"/>97.87 | <text:s text:c="4"/>97.87 | <text:s text:c="4"/>97.87</text:p>
      <text:p text:style-name="P27">XPOS <text:s text:c="6"/>| <text:s text:c="4"/>92.73 | <text:s text:c="4"/>92.73 | <text:s text:c="4"/>92.73 | <text:s text:c="4"/>92.73</text:p>
      <text:p text:style-name="P27">UFeats <text:s text:c="4"/>| <text:s text:c="4"/>92.72 | <text:s text:c="4"/>92.72 | <text:s text:c="4"/>92.72 | <text:s text:c="4"/>92.72</text:p>
      <text:p text:style-name="P27">AllTags <text:s text:c="3"/>| <text:s text:c="4"/>91.91 | <text:s text:c="4"/>91.91 | <text:s text:c="4"/>91.91 | <text:s text:c="4"/>91.91</text:p>
      <text:p text:style-name="P27">Lemmas <text:s text:c="4"/>| <text:s text:c="4"/>95.47 | <text:s text:c="4"/>95.47 | <text:s text:c="4"/>95.47 | <text:s text:c="4"/>95.47</text:p>
      <text:p text:style-name="P28"><text:span text:style-name="T16">Teď</text:span> pomocí mého modelu natrénovaného na Etalonu 1<text:span text:style-name="T16">6</text:span>.</text:p>
      <text:p text:style-name="P29">Metric <text:s text:c="4"/>| Precision | <text:s text:c="3"/>Recall | <text:s/>F1 Score | AligndAcc</text:p>
      <text:p text:style-name="P29">-----------+-----------+-----------+-----------+-----------</text:p>
      <text:p text:style-name="P30">UPOS <text:s text:c="6"/>| <text:s text:c="4"/>95.58 | <text:s text:c="4"/>95.58 | <text:s text:c="4"/>95.58 | <text:s text:c="4"/>95.58</text:p>
      <text:p text:style-name="P30">XPOS <text:s text:c="6"/>| <text:s text:c="4"/>86.47 | <text:s text:c="4"/>86.47 | <text:s text:c="4"/>86.47 | <text:s text:c="4"/>86.47</text:p>
      <text:p text:style-name="P30">UFeats <text:s text:c="4"/>| <text:s text:c="4"/>86.75 | <text:s text:c="4"/>86.75 | <text:s text:c="4"/>86.75 | <text:s text:c="4"/>86.75</text:p>
      <text:p text:style-name="P30">AllTags <text:s text:c="3"/>| <text:s text:c="4"/>85.50 | <text:s text:c="4"/>85.50 | <text:s text:c="4"/>85.50 | <text:s text:c="4"/>85.50</text:p>
      <text:p text:style-name="P30">Lemmas <text:s text:c="4"/>| <text:s text:c="4"/>86.89 | <text:s text:c="4"/>86.89 | <text:s text:c="4"/>86.89 | <text:s text:c="4"/>86.89</text:p>
      <text:p text:style-name="P28"><text:span text:style-name="T16">Teď</text:span> pomocí mého modelu natrénovaného na Etalonu 1<text:span text:style-name="T17">9</text:span>.</text:p>
      <text:p text:style-name="P29">Metric <text:s text:c="4"/>| Precision | <text:s text:c="3"/>Recall | <text:s/>F1 Score | AligndAcc</text:p>
      <text:p text:style-name="P29">-----------+-----------+-----------+-----------+-----------</text:p>
      <text:p text:style-name="P30">UPOS <text:s text:c="6"/>| <text:s text:c="4"/>93.43 | <text:s text:c="4"/>93.43 | <text:s text:c="4"/>93.43 | <text:s text:c="4"/>93.43</text:p>
      <text:p text:style-name="P30">XPOS <text:s text:c="6"/>| <text:s text:c="4"/>77.37 | <text:s text:c="4"/>77.37 | <text:s text:c="4"/>77.37 | <text:s text:c="4"/>77.37</text:p>
      <text:p text:style-name="P30">UFeats <text:s text:c="4"/>| <text:s text:c="4"/>77.87 | <text:s text:c="4"/>77.87 | <text:s text:c="4"/>77.87 | <text:s text:c="4"/>77.87</text:p>
      <text:p text:style-name="P30">AllTags <text:s text:c="3"/>| <text:s text:c="4"/>75.81 | <text:s text:c="4"/>75.81 | <text:s text:c="4"/>75.81 | <text:s text:c="4"/>75.81</text:p>
      <text:p text:style-name="P30">Lemmas <text:s text:c="4"/>| <text:s text:c="4"/>80.03 | <text:s text:c="4"/>80.03 | <text:s text:c="4"/>80.03 | <text:s text:c="4"/>80.03</text:p>
      <text:h text:style-name="P31" text:outline-level="3">Etalon 16</text:h>
      <text:p text:style-name="P32"><text:span text:style-name="T7">D</text:span><text:span text:style-name="T18">ev</text:span><text:span text:style-name="T9">:</text:span><text:span text:style-name="T19"> </text:span><text:span text:style-name="T20">049_frantovy_prava (1518), 065_o_ctnych_manzelkach_tehotnych (1615), 076_smol_jimr (soudní zápis, 1726) … 9691 slov.</text:span></text:p>
      <text:p text:style-name="P33"><text:span text:style-name="T6">T</text:span><text:span text:style-name="T21">est</text:span>:<text:span text:style-name="T19"> 050_hanus (1538), </text:span><text:span text:style-name="T22">063_div_velik (1612), 080_pranostika_nova (1766) … 9556 slov.</text:span></text:p>
      <text:p text:style-name="P23"><text:soft-page-break/>Metric <text:s text:c="4"/>| Precision | <text:s text:c="3"/>Recall | <text:s/>F1 Score | AligndAcc</text:p>
      <text:p text:style-name="P23">-----------+-----------+-----------+-----------+-----------</text:p>
      <text:p text:style-name="P24">UPOS <text:s text:c="6"/>| <text:s text:c="4"/>96.66 | <text:s text:c="4"/>96.66 | <text:s text:c="4"/>96.66 | <text:s text:c="4"/>96.66</text:p>
      <text:p text:style-name="P24">XPOS <text:s text:c="6"/>| <text:s text:c="4"/>50.63 | <text:s text:c="4"/>50.63 | <text:s text:c="4"/>50.63 | <text:s text:c="4"/>50.63</text:p>
      <text:p text:style-name="P24">UFeats <text:s text:c="4"/>| <text:s text:c="4"/>72.71 | <text:s text:c="4"/>72.71 | <text:s text:c="4"/>72.71 | <text:s text:c="4"/>72.71</text:p>
      <text:p text:style-name="P24">AllTags <text:s text:c="3"/>| <text:s text:c="4"/>49.35 | <text:s text:c="4"/>49.35 | <text:s text:c="4"/>49.35 | <text:s text:c="4"/>49.35</text:p>
      <text:p text:style-name="P24">Lemmas <text:s text:c="4"/>| <text:s text:c="4"/>91.72 | <text:s text:c="4"/>91.72 | <text:s text:c="4"/>91.72 | <text:s text:c="4"/>91.72</text:p>
      <text:p text:style-name="P34">To nahoře je pomocí modelu FicTree 2.17. To dole je pomocí mého modelu natrénovaného na Etalonu 13.</text:p>
      <text:p text:style-name="P35">Metric <text:s text:c="4"/>| Precision | <text:s text:c="3"/>Recall | <text:s/>F1 Score | AligndAcc</text:p>
      <text:p text:style-name="P35">-----------+-----------+-----------+-----------+-----------</text:p>
      <text:p text:style-name="P36">UPOS <text:s text:c="6"/>| <text:s text:c="4"/>97.98 | <text:s text:c="4"/>97.98 | <text:s text:c="4"/>97.98 | <text:s text:c="4"/>97.98</text:p>
      <text:p text:style-name="P36">XPOS <text:s text:c="6"/>| <text:s text:c="4"/>89.88 | <text:s text:c="4"/>89.88 | <text:s text:c="4"/>89.88 | <text:s text:c="4"/>89.88</text:p>
      <text:p text:style-name="P36">UFeats <text:s text:c="4"/>| <text:s text:c="4"/>90.00 | <text:s text:c="4"/>90.00 | <text:s text:c="4"/>90.00 | <text:s text:c="4"/>90.00</text:p>
      <text:p text:style-name="P36">AllTags <text:s text:c="3"/>| <text:s text:c="4"/>88.92 | <text:s text:c="4"/>88.92 | <text:s text:c="4"/>88.92 | <text:s text:c="4"/>88.92</text:p>
      <text:p text:style-name="P36">Lemmas <text:s text:c="4"/>| <text:s text:c="4"/>91.86 | <text:s text:c="4"/>91.86 | <text:s text:c="4"/>91.86 | <text:s text:c="4"/>91.86</text:p>
      <text:p text:style-name="P37"><text:span text:style-name="T16">Teď</text:span> pomocí mého modelu natrénovaného na Etalonu 1<text:span text:style-name="T16">6</text:span>.</text:p>
      <text:p text:style-name="P38">Metric <text:s text:c="4"/>| Precision | <text:s text:c="3"/>Recall | <text:s/>F1 Score | AligndAcc</text:p>
      <text:p text:style-name="P38">-----------+-----------+-----------+-----------+-----------</text:p>
      <text:p text:style-name="P39">UPOS <text:s text:c="6"/>| <text:s text:c="4"/>98.67 | <text:s text:c="4"/>98.67 | <text:s text:c="4"/>98.67 | <text:s text:c="4"/>98.67</text:p>
      <text:p text:style-name="P39">XPOS <text:s text:c="6"/>| <text:s text:c="4"/>93.79 | <text:s text:c="4"/>93.79 | <text:s text:c="4"/>93.79 | <text:s text:c="4"/>93.79</text:p>
      <text:p text:style-name="P39">UFeats <text:s text:c="4"/>| <text:s text:c="4"/>93.78 | <text:s text:c="4"/>93.78 | <text:s text:c="4"/>93.78 | <text:s text:c="4"/>93.78</text:p>
      <text:p text:style-name="P39">AllTags <text:s text:c="3"/>| <text:s text:c="4"/>92.96 | <text:s text:c="4"/>92.96 | <text:s text:c="4"/>92.96 | <text:s text:c="4"/>92.96</text:p>
      <text:p text:style-name="P39">Lemmas <text:s text:c="4"/>| <text:s text:c="4"/>95.37 | <text:s text:c="4"/>95.37 | <text:s text:c="4"/>95.37 | <text:s text:c="4"/>95.37</text:p>
      <text:p text:style-name="P40"><text:span text:style-name="T16">Teď</text:span><text:span text:style-name="T23"> pomocí mého modelu natrénovaného na Etalonu 1</text:span><text:span text:style-name="T17">9</text:span><text:span text:style-name="T23">.</text:span></text:p>
      <text:p text:style-name="P38">Metric <text:s text:c="4"/>| Precision | <text:s text:c="3"/>Recall | <text:s/>F1 Score | AligndAcc</text:p>
      <text:p text:style-name="P38">-----------+-----------+-----------+-----------+-----------</text:p>
      <text:p text:style-name="P41">UPOS <text:s text:c="6"/>| <text:s text:c="4"/>97.21 | <text:s text:c="4"/>97.21 | <text:s text:c="4"/>97.21 | <text:s text:c="4"/>97.21</text:p>
      <text:p text:style-name="P41">XPOS <text:s text:c="6"/>| <text:s text:c="4"/>85.48 | <text:s text:c="4"/>85.48 | <text:s text:c="4"/>85.48 | <text:s text:c="4"/>85.48</text:p>
      <text:p text:style-name="P41">UFeats <text:s text:c="4"/>| <text:s text:c="4"/>84.22 | <text:s text:c="4"/>84.22 | <text:s text:c="4"/>84.22 | <text:s text:c="4"/>84.22</text:p>
      <text:p text:style-name="P41">AllTags <text:s text:c="3"/>| <text:s text:c="4"/>83.25 | <text:s text:c="4"/>83.25 | <text:s text:c="4"/>83.25 | <text:s text:c="4"/>83.25</text:p>
      <text:p text:style-name="P41">Lemmas <text:s text:c="4"/>| <text:s text:c="4"/>92.65 | <text:s text:c="4"/>92.65 | <text:s text:c="4"/>92.65 | <text:s text:c="4"/>92.65</text:p>
      <text:h text:style-name="P42" text:outline-level="3">Etalon 19</text:h>
      <text:p text:style-name="P43"><text:span text:style-name="T6">D</text:span><text:span text:style-name="T21">ev</text:span>:<text:span text:style-name="T19"> 1802_krameriusovy_noviny_21.8.1802, 1832_svihlik_edmund_a_belinka, 1855_stroupeznicka_boure, </text:span><text:span text:style-name="T24">1869_jaros_z_chladku … 8897 slov.</text:span></text:p>
      <text:p text:style-name="P44"><text:soft-page-break/><text:span text:style-name="T6">T</text:span>est:<text:span text:style-name="T19"> 1808_kramerius_vyd_rozlicne_povidacky, 1827_rettigova_bila_ruze, 1846_prazske_noviny_19.3.1846, 1874_palacky_nejnovejsi_politicke_uvahy … 8891 slov.</text:span></text:p>
      <text:p text:style-name="P23">Metric <text:s text:c="4"/>| Precision | <text:s text:c="3"/>Recall | <text:s/>F1 Score | AligndAcc</text:p>
      <text:p text:style-name="P23">-----------+-----------+-----------+-----------+-----------</text:p>
      <text:p text:style-name="P24">UPOS <text:s text:c="6"/>| <text:s text:c="4"/>95.05 | <text:s text:c="4"/>95.05 | <text:s text:c="4"/>95.05 | <text:s text:c="4"/>95.05</text:p>
      <text:p text:style-name="P24">XPOS <text:s text:c="6"/>| <text:s text:c="4"/>49.72 | <text:s text:c="4"/>49.72 | <text:s text:c="4"/>49.72 | <text:s text:c="4"/>49.72</text:p>
      <text:p text:style-name="P24">UFeats <text:s text:c="4"/>| <text:s text:c="4"/>74.83 | <text:s text:c="4"/>74.83 | <text:s text:c="4"/>74.83 | <text:s text:c="4"/>74.83</text:p>
      <text:p text:style-name="P24">AllTags <text:s text:c="3"/>| <text:s text:c="4"/>48.73 | <text:s text:c="4"/>48.73 | <text:s text:c="4"/>48.73 | <text:s text:c="4"/>48.73</text:p>
      <text:p text:style-name="P24">Lemmas <text:s text:c="4"/>| <text:s text:c="4"/>93.17 | <text:s text:c="4"/>93.17 | <text:s text:c="4"/>93.17 | <text:s text:c="4"/>93.17</text:p>
      <text:p text:style-name="P45">To nahoře je pomocí modelu FicTree 2.17. To dole je pomocí mého modelu natrénovaného na Etalonu 13.</text:p>
      <text:p text:style-name="P46">Metric <text:s text:c="4"/>| Precision | <text:s text:c="3"/>Recall | <text:s/>F1 Score | AligndAcc</text:p>
      <text:p text:style-name="P46">-----------+-----------+-----------+-----------+-----------</text:p>
      <text:p text:style-name="P47">UPOS <text:s text:c="6"/>| <text:s text:c="4"/>95.08 | <text:s text:c="4"/>95.08 | <text:s text:c="4"/>95.08 | <text:s text:c="4"/>95.08</text:p>
      <text:p text:style-name="P47">XPOS <text:s text:c="6"/>| <text:s text:c="4"/>83.96 | <text:s text:c="4"/>83.96 | <text:s text:c="4"/>83.96 | <text:s text:c="4"/>83.96</text:p>
      <text:p text:style-name="P47">UFeats <text:s text:c="4"/>| <text:s text:c="4"/>83.07 | <text:s text:c="4"/>83.07 | <text:s text:c="4"/>83.07 | <text:s text:c="4"/>83.07</text:p>
      <text:p text:style-name="P47">AllTags <text:s text:c="3"/>| <text:s text:c="4"/>81.35 | <text:s text:c="4"/>81.35 | <text:s text:c="4"/>81.35 | <text:s text:c="4"/>81.35</text:p>
      <text:p text:style-name="P47">Lemmas <text:s text:c="4"/>| <text:s text:c="4"/>90.15 | <text:s text:c="4"/>90.15 | <text:s text:c="4"/>90.15 | <text:s text:c="4"/>90.15</text:p>
      <text:p text:style-name="P48"><text:span text:style-name="T16">Teď</text:span> pomocí mého modelu natrénovaného na Etalonu 1<text:span text:style-name="T16">6</text:span>.</text:p>
      <text:p text:style-name="P49">Metric <text:s text:c="4"/>| Precision | <text:s text:c="3"/>Recall | <text:s/>F1 Score | AligndAcc</text:p>
      <text:p text:style-name="P49">-----------+-----------+-----------+-----------+-----------</text:p>
      <text:p text:style-name="P41">UPOS <text:s text:c="6"/>| <text:s text:c="4"/>95.65 | <text:s text:c="4"/>95.65 | <text:s text:c="4"/>95.65 | <text:s text:c="4"/>95.65</text:p>
      <text:p text:style-name="P41">XPOS <text:s text:c="6"/>| <text:s text:c="4"/>87.22 | <text:s text:c="4"/>87.22 | <text:s text:c="4"/>87.22 | <text:s text:c="4"/>87.22</text:p>
      <text:p text:style-name="P41">UFeats <text:s text:c="4"/>| <text:s text:c="4"/>86.00 | <text:s text:c="4"/>86.00 | <text:s text:c="4"/>86.00 | <text:s text:c="4"/>86.00</text:p>
      <text:p text:style-name="P41">AllTags <text:s text:c="3"/>| <text:s text:c="4"/>84.73 | <text:s text:c="4"/>84.73 | <text:s text:c="4"/>84.73 | <text:s text:c="4"/>84.73</text:p>
      <text:p text:style-name="P41">Lemmas <text:s text:c="4"/>| <text:s text:c="4"/>93.95 | <text:s text:c="4"/>93.95 | <text:s text:c="4"/>93.95 | <text:s text:c="4"/>93.95</text:p>
      <text:p text:style-name="P50"><text:span text:style-name="T16">Teď</text:span><text:span text:style-name="T23"> pomocí mého modelu natrénovaného na Etalonu 1</text:span><text:span text:style-name="T17">9</text:span><text:span text:style-name="T23">.</text:span></text:p>
      <text:p text:style-name="P49">Metric <text:s text:c="4"/>| Precision | <text:s text:c="3"/>Recall | <text:s/>F1 Score | AligndAcc</text:p>
      <text:p text:style-name="P49">-----------+-----------+-----------+-----------+-----------</text:p>
      <text:p text:style-name="P51">UPOS <text:s text:c="6"/>| <text:s text:c="4"/>98.50 | <text:s text:c="4"/>98.50 | <text:s text:c="4"/>98.50 | <text:s text:c="4"/>98.50</text:p>
      <text:p text:style-name="P51">XPOS <text:s text:c="6"/>| <text:s text:c="4"/>95.73 | <text:s text:c="4"/>95.73 | <text:s text:c="4"/>95.73 | <text:s text:c="4"/>95.73</text:p>
      <text:p text:style-name="P51">UFeats <text:s text:c="4"/>| <text:s text:c="4"/>95.65 | <text:s text:c="4"/>95.65 | <text:s text:c="4"/>95.65 | <text:s text:c="4"/>95.65</text:p>
      <text:p text:style-name="P51">AllTags <text:s text:c="3"/>| <text:s text:c="4"/>95.04 | <text:s text:c="4"/>95.04 | <text:s text:c="4"/>95.04 | <text:s text:c="4"/>95.04</text:p>
      <text:p text:style-name="P51">Lemmas <text:s text:c="4"/>| <text:s text:c="4"/>96.88 | <text:s text:c="4"/>96.88 | <text:s text:c="4"/>96.88 | <text:s text:c="4"/>96.88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6T16:13:48.289618200</dc:date>
    <dc:creator>Daniel Zeman</dc:creator>
    <meta:editing-duration>PT19H17M7S</meta:editing-duration>
    <meta:editing-cycles>31</meta:editing-cycles>
    <meta:generator>LibreOffice/25.2.7.2$Windows_X86_64 LibreOffice_project/5cbfd1ab6520636bb5f7b99185aa69bd7456825d</meta:generator>
    <meta:document-statistic meta:table-count="0" meta:image-count="0" meta:object-count="0" meta:page-count="5" meta:paragraph-count="143" meta:word-count="1559" meta:character-count="10684" meta:non-whitespace-character-count="7673"/>
  </office:meta>
</office:document-meta>
</file>